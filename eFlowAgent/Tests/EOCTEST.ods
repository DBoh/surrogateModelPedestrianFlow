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 style:data-style-name="N61">
      <style:text-properties style:text-position="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 style:data-style-name="N61">
      <style:table-cell-properties fo:background-color="#66ffff"/>
    </style:style>
    <style:style style:name="ce7" style:family="table-cell" style:parent-style-name="Default" style:data-style-name="N61">
      <style:table-cell-properties fo:background-color="#ffff99"/>
    </style:style>
    <style:style style:name="ce8" style:family="table-cell" style:parent-style-name="Default" style:data-style-name="N61">
      <style:table-cell-properties fo:background-color="#ffcc00"/>
    </style:style>
    <style:style style:name="ce10" style:family="table-cell" style:parent-style-name="Default" style:data-style-name="N61">
      <style:table-cell-properties fo:background-color="#ff99ff"/>
    </style:style>
    <style:style style:name="ce11" style:family="table-cell" style:parent-style-name="Default" style:data-style-name="N61"/>
  </office:automatic-styles>
  <office:body>
    <office:spreadsheet>
      <table:calculation-settings table:automatic-find-labels="false"/>
      <table:table table:name="Tabelle3" table:style-name="ta1">
        <table:table-column table:style-name="co1" table:number-columns-repeated="5" table:default-cell-style-name="ce4"/>
        <table:table-column table:style-name="co1" table:number-columns-repeated="3" table:default-cell-style-name="ce8"/>
        <table:table-column table:style-name="co1" table:default-cell-style-name="ce4"/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-2.6E-017" calcext:value-type="float">
            <text:p>-2.60E-17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2.6E-017" calcext:value-type="float">
            <text:p>2.60E-1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-4.86E-017" calcext:value-type="float">
            <text:p>-4.86E-17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4.86E-017" calcext:value-type="float">
            <text:p>4.86E-1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-9.06E-017" calcext:value-type="float">
            <text:p>-9.06E-17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9.06E-017" calcext:value-type="float">
            <text:p>9.06E-1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.56E-015" calcext:value-type="float">
            <text:p>1.56E-15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56E-015" calcext:value-type="float">
            <text:p>1.56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4.77E-015" calcext:value-type="float">
            <text:p>4.77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4.77E-015" calcext:value-type="float">
            <text:p>4.77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00000000000137" calcext:value-type="float">
            <text:p>1.37E-14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0.0000000000000137" calcext:value-type="float">
            <text:p>1.37E-1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.6E-016" calcext:value-type="float">
            <text:p>2.60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2.6E-016" calcext:value-type="float">
            <text:p>2.60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.14E-016" calcext:value-type="float">
            <text:p>1.14E-16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1.14E-016" calcext:value-type="float">
            <text:p>1.14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.82E-017" calcext:value-type="float">
            <text:p>1.82E-17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1.82E-017" calcext:value-type="float">
            <text:p>1.82E-1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1.2E-016" calcext:value-type="float">
            <text:p>-1.20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2E-016" calcext:value-type="float">
            <text:p>1.20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3.77E-016" calcext:value-type="float">
            <text:p>-3.77E-16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3.77E-016" calcext:value-type="float">
            <text:p>3.77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4.42E-016" calcext:value-type="float">
            <text:p>4.42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4.42E-016" calcext:value-type="float">
            <text:p>4.42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4.44E-016" calcext:value-type="float">
            <text:p>4.44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2.22E-016" calcext:value-type="float">
            <text:p>2.22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6.66E-016" calcext:value-type="float">
            <text:p>6.66E-16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3" calcext:value-type="float">
            <text:p>1.30E-03</text:p>
          </table:table-cell>
          <table:table-cell table:formula="of:=[Tabelle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326" calcext:value-type="float">
            <text:p>3.26E-04</text:p>
          </table:table-cell>
          <table:table-cell table:formula="of:=[Tabelle4.E1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814" calcext:value-type="float">
            <text:p>8.14E-05</text:p>
          </table:table-cell>
          <table:table-cell table:formula="of:=[Tabelle4.E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73" calcext:value-type="float">
            <text:p>7.73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52" calcext:value-type="float">
            <text:p>2.52E-04</text:p>
          </table:table-cell>
          <table:table-cell table:formula="of:=[Tabelle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74" calcext:value-type="float">
            <text:p>7.74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63" calcext:value-type="float">
            <text:p>6.30E-05</text:p>
          </table:table-cell>
          <table:table-cell table:formula="of:=[Tabelle4.E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74" calcext:value-type="float">
            <text:p>7.74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57" calcext:value-type="float">
            <text:p>1.57E-05</text:p>
          </table:table-cell>
          <table:table-cell table:formula="of:=[Tabelle4.E23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4.67" calcext:value-type="float">
            <text:p>4.67E+00</text:p>
          </table:table-cell>
          <table:table-cell table:style-name="ce10" office:value-type="float" office:value="0.0625" calcext:value-type="float">
            <text:p>6.25E-02</text:p>
          </table:table-cell>
          <table:table-cell table:style-name="ce10" office:value-type="float" office:value="0.0000000000334" calcext:value-type="float">
            <text:p>3.34E-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4.67" calcext:value-type="float">
            <text:p>4.67E+00</text:p>
          </table:table-cell>
          <table:table-cell table:style-name="ce10" office:value-type="float" office:value="0.0312" calcext:value-type="float">
            <text:p>3.12E-02</text:p>
          </table:table-cell>
          <table:table-cell table:style-name="ce10" office:value-type="float" office:value="0.0000000000336" calcext:value-type="float">
            <text:p>3.36E-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4.67" calcext:value-type="float">
            <text:p>4.67E+00</text:p>
          </table:table-cell>
          <table:table-cell table:style-name="ce10" office:value-type="float" office:value="0.0156" calcext:value-type="float">
            <text:p>1.56E-02</text:p>
          </table:table-cell>
          <table:table-cell table:style-name="ce10" office:value-type="float" office:value="0.0000000000344" calcext:value-type="float">
            <text:p>3.44E-11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26" calcext:value-type="float">
            <text:p>2.60E-03</text:p>
          </table:table-cell>
          <table:table-cell table:formula="of:=[Tabelle4.E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651" calcext:value-type="float">
            <text:p>6.51E-04</text:p>
          </table:table-cell>
          <table:table-cell table:formula="of:=[Tabelle4.E31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63" calcext:value-type="float">
            <text:p>1.63E-04</text:p>
          </table:table-cell>
          <table:table-cell table:formula="of:=[Tabelle4.E3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558" calcext:value-type="float">
            <text:p>5.58E-04</text:p>
          </table:table-cell>
          <table:table-cell table:formula="of:=[Tabelle4.E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4" calcext:value-type="float">
            <text:p>1.40E-04</text:p>
          </table:table-cell>
          <table:table-cell table:formula="of:=[Tabelle4.E34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349" calcext:value-type="float">
            <text:p>3.49E-05</text:p>
          </table:table-cell>
          <table:table-cell table:formula="of:=[Tabelle4.E35]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.497" calcext:value-type="float">
            <text:p>4.97E-01</text:p>
          </table:table-cell>
          <table:table-cell table:style-name="ce10" office:value-type="float" office:value="0.0625" calcext:value-type="float">
            <text:p>6.25E-02</text:p>
          </table:table-cell>
          <table:table-cell table:style-name="ce10" office:value-type="float" office:value="0.000162" calcext:value-type="float">
            <text:p>1.62E-04</text:p>
          </table:table-cell>
          <table:table-cell table:style-name="ce5" table:formula="of:=[Tabelle4.E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.497" calcext:value-type="float">
            <text:p>4.97E-01</text:p>
          </table:table-cell>
          <table:table-cell table:style-name="ce10" office:value-type="float" office:value="0.0312" calcext:value-type="float">
            <text:p>3.12E-02</text:p>
          </table:table-cell>
          <table:table-cell table:style-name="ce10" office:value-type="float" office:value="0.0000404" calcext:value-type="float">
            <text:p>4.04E-05</text:p>
          </table:table-cell>
          <table:table-cell table:style-name="ce5" table:formula="of:=[Tabelle4.E37]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.497" calcext:value-type="float">
            <text:p>4.97E-01</text:p>
          </table:table-cell>
          <table:table-cell table:style-name="ce10" office:value-type="float" office:value="0.0156" calcext:value-type="float">
            <text:p>1.56E-02</text:p>
          </table:table-cell>
          <table:table-cell table:style-name="ce10" office:value-type="float" office:value="0.0000101" calcext:value-type="float">
            <text:p>1.01E-05</text:p>
          </table:table-cell>
          <table:table-cell table:style-name="ce5" table:formula="of:=[Tabelle4.E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3.65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19" calcext:value-type="float">
            <text:p>1.19E-04</text:p>
          </table:table-cell>
          <table:table-cell table:formula="of:=[Tabelle4.E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6" calcext:value-type="float">
            <text:p>3.66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98" calcext:value-type="float">
            <text:p>2.98E-05</text:p>
          </table:table-cell>
          <table:table-cell table:formula="of:=[Tabelle4.E40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6" calcext:value-type="float">
            <text:p>3.66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744" calcext:value-type="float">
            <text:p>7.44E-06</text:p>
          </table:table-cell>
          <table:table-cell table:formula="of:=[Tabelle4.E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8" calcext:value-type="float">
            <text:p>3.0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23" calcext:value-type="float">
            <text:p>2.23E-04</text:p>
          </table:table-cell>
          <table:table-cell table:formula="of:=[Tabelle4.E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558" calcext:value-type="float">
            <text:p>5.58E-05</text:p>
          </table:table-cell>
          <table:table-cell table:formula="of:=[Tabelle4.E43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4" calcext:value-type="float">
            <text:p>1.40E-05</text:p>
          </table:table-cell>
          <table:table-cell table:formula="of:=[Tabelle4.E44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05" calcext:value-type="float">
            <text:p>1.05E-04</text:p>
          </table:table-cell>
          <table:table-cell table:formula="of:=[Tabelle4.E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62" calcext:value-type="float">
            <text:p>2.62E-05</text:p>
          </table:table-cell>
          <table:table-cell table:formula="of:=[Tabelle4.E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655" calcext:value-type="float">
            <text:p>6.55E-06</text:p>
          </table:table-cell>
          <table:table-cell table:formula="of:=[Tabelle4.E47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.14E-015" calcext:value-type="float">
            <text:p>1.14E-15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14E-015" calcext:value-type="float">
            <text:p>1.14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4.3E-015" calcext:value-type="float">
            <text:p>4.30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4.3E-015" calcext:value-type="float">
            <text:p>4.30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.0000000000000148" calcext:value-type="float">
            <text:p>1.48E-14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0.0000000000000148" calcext:value-type="float">
            <text:p>1.48E-1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.68E-016" calcext:value-type="float">
            <text:p>3.68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3.68E-016" calcext:value-type="float">
            <text:p>3.68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.4E-015" calcext:value-type="float">
            <text:p>1.40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1.4E-015" calcext:value-type="float">
            <text:p>1.40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.22E-015" calcext:value-type="float">
            <text:p>1.22E-15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1.22E-015" calcext:value-type="float">
            <text:p>1.22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.43E-015" calcext:value-type="float">
            <text:p>2.43E-15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2.43E-015" calcext:value-type="float">
            <text:p>2.43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.98E-015" calcext:value-type="float">
            <text:p>2.98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2.98E-015" calcext:value-type="float">
            <text:p>2.98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.0000000000000189" calcext:value-type="float">
            <text:p>1.89E-14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0.0000000000000189" calcext:value-type="float">
            <text:p>1.89E-1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6.42E-017" calcext:value-type="float">
            <text:p>6.42E-17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6.42E-017" calcext:value-type="float">
            <text:p>6.42E-1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4.15E-016" calcext:value-type="float">
            <text:p>4.15E-16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4.15E-016" calcext:value-type="float">
            <text:p>4.15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.13E-016" calcext:value-type="float">
            <text:p>2.13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2.13E-016" calcext:value-type="float">
            <text:p>2.13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8.88E-016" calcext:value-type="float">
            <text:p>8.88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2.22E-016" calcext:value-type="float">
            <text:p>2.22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2.33" calcext:value-type="float">
            <text:p>2.33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2.33" calcext:value-type="float">
            <text:p>2.33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.0000000000332" calcext:value-type="float">
            <text:p>3.32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2.33" calcext:value-type="float">
            <text:p>2.33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.0000000000329" calcext:value-type="float">
            <text:p>3.29E-11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3" calcext:value-type="float">
            <text:p>1.30E-03</text:p>
          </table:table-cell>
          <table:table-cell table:formula="of:=[Tabelle4.E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326" calcext:value-type="float">
            <text:p>3.26E-04</text:p>
          </table:table-cell>
          <table:table-cell table:formula="of:=[Tabelle4.E67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814" calcext:value-type="float">
            <text:p>8.14E-05</text:p>
          </table:table-cell>
          <table:table-cell table:formula="of:=[Tabelle4.E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58" calcext:value-type="float">
            <text:p>8.5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79" calcext:value-type="float">
            <text:p>2.79E-04</text:p>
          </table:table-cell>
          <table:table-cell table:formula="of:=[Tabelle4.E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58" calcext:value-type="float">
            <text:p>8.5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698" calcext:value-type="float">
            <text:p>6.98E-05</text:p>
          </table:table-cell>
          <table:table-cell table:formula="of:=[Tabelle4.E70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58" calcext:value-type="float">
            <text:p>8.5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75" calcext:value-type="float">
            <text:p>1.75E-05</text:p>
          </table:table-cell>
          <table:table-cell table:formula="of:=[Tabelle4.E71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4.67" calcext:value-type="float">
            <text:p>4.67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.0000000000334" calcext:value-type="float">
            <text:p>3.34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4.67" calcext:value-type="float">
            <text:p>4.67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.0000000000336" calcext:value-type="float">
            <text:p>3.36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4.67" calcext:value-type="float">
            <text:p>4.67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.0000000000344" calcext:value-type="float">
            <text:p>3.44E-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6" calcext:value-type="float">
            <text:p>6.00E+00</text:p>
          </table:table-cell>
          <table:table-cell table:style-name="ce10" office:value-type="float" office:value="0.0625" calcext:value-type="float">
            <text:p>6.25E-02</text:p>
          </table:table-cell>
          <table:table-cell table:style-name="ce10" office:value-type="float" office:value="8.88E-016" calcext:value-type="float">
            <text:p>8.88E-16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6" calcext:value-type="float">
            <text:p>6.00E+00</text:p>
          </table:table-cell>
          <table:table-cell table:style-name="ce10" office:value-type="float" office:value="0.0312" calcext:value-type="float">
            <text:p>3.12E-02</text:p>
          </table:table-cell>
          <table:table-cell table:style-name="ce10" office:value-type="float" office:value="2.66E-015" calcext:value-type="float">
            <text:p>2.66E-15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6" calcext:value-type="float">
            <text:p>6.00E+00</text:p>
          </table:table-cell>
          <table:table-cell table:style-name="ce10" office:value-type="float" office:value="0.0156" calcext:value-type="float">
            <text:p>1.56E-02</text:p>
          </table:table-cell>
          <table:table-cell table:style-name="ce10" office:value-type="float" office:value="1.78E-015" calcext:value-type="float">
            <text:p>1.78E-15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7" calcext:value-type="float">
            <text:p>8.2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304" calcext:value-type="float">
            <text:p>3.04E-03</text:p>
          </table:table-cell>
          <table:table-cell table:formula="of:=[Tabelle4.E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7" calcext:value-type="float">
            <text:p>8.2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76" calcext:value-type="float">
            <text:p>7.60E-04</text:p>
          </table:table-cell>
          <table:table-cell table:formula="of:=[Tabelle4.E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7" calcext:value-type="float">
            <text:p>8.2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9" calcext:value-type="float">
            <text:p>1.90E-04</text:p>
          </table:table-cell>
          <table:table-cell table:formula="of:=[Tabelle4.E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87" calcext:value-type="float">
            <text:p>6.87E-04</text:p>
          </table:table-cell>
          <table:table-cell table:formula="of:=[Tabelle4.E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72" calcext:value-type="float">
            <text:p>1.72E-04</text:p>
          </table:table-cell>
          <table:table-cell table:formula="of:=[Tabelle4.E8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29" calcext:value-type="float">
            <text:p>4.29E-05</text:p>
          </table:table-cell>
          <table:table-cell table:formula="of:=[Tabelle4.E8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3.65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19" calcext:value-type="float">
            <text:p>1.19E-04</text:p>
          </table:table-cell>
          <table:table-cell table:formula="of:=[Tabelle4.E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3.66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98" calcext:value-type="float">
            <text:p>2.98E-05</text:p>
          </table:table-cell>
          <table:table-cell table:formula="of:=[Tabelle4.E85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3.66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744" calcext:value-type="float">
            <text:p>7.44E-06</text:p>
          </table:table-cell>
          <table:table-cell table:formula="of:=[Tabelle4.E8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" calcext:value-type="float">
            <text:p>1.00E-04</text:p>
          </table:table-cell>
          <table:table-cell table:formula="of:=[Tabelle4.E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5" calcext:value-type="float">
            <text:p>2.50E-05</text:p>
          </table:table-cell>
          <table:table-cell table:formula="of:=[Tabelle4.E8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625" calcext:value-type="float">
            <text:p>6.25E-06</text:p>
          </table:table-cell>
          <table:table-cell table:formula="of:=[Tabelle4.E8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5" calcext:value-type="float">
            <text:p>1.50E-04</text:p>
          </table:table-cell>
          <table:table-cell table:formula="of:=[Tabelle4.E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75" calcext:value-type="float">
            <text:p>3.75E-05</text:p>
          </table:table-cell>
          <table:table-cell table:formula="of:=[Tabelle4.E9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937" calcext:value-type="float">
            <text:p>9.37E-06</text:p>
          </table:table-cell>
          <table:table-cell table:formula="of:=[Tabelle4.E9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877" calcext:value-type="float">
            <text:p>8.77E-05</text:p>
          </table:table-cell>
          <table:table-cell table:formula="of:=[Tabelle4.E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19" calcext:value-type="float">
            <text:p>2.19E-05</text:p>
          </table:table-cell>
          <table:table-cell table:formula="of:=[Tabelle4.E9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48" calcext:value-type="float">
            <text:p>5.48E-06</text:p>
          </table:table-cell>
          <table:table-cell table:formula="of:=[Tabelle4.E95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9.26E-016" calcext:value-type="float">
            <text:p>9.26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9.26E-016" calcext:value-type="float">
            <text:p>9.26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.18E-015" calcext:value-type="float">
            <text:p>1.18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1.18E-015" calcext:value-type="float">
            <text:p>1.18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7.21E-016" calcext:value-type="float">
            <text:p>7.21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7.21E-016" calcext:value-type="float">
            <text:p>7.21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.8E-015" calcext:value-type="float">
            <text:p>1.80E-15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8E-015" calcext:value-type="float">
            <text:p>1.80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.38E-015" calcext:value-type="float">
            <text:p>2.38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2.38E-015" calcext:value-type="float">
            <text:p>2.38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0000000000019" calcext:value-type="float">
            <text:p>1.90E-14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0.000000000000019" calcext:value-type="float">
            <text:p>1.90E-1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-1.06E-015" calcext:value-type="float">
            <text:p>-1.06E-15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06E-015" calcext:value-type="float">
            <text:p>1.06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.41E-016" calcext:value-type="float">
            <text:p>5.41E-16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5.41E-016" calcext:value-type="float">
            <text:p>5.41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-3.64E-015" calcext:value-type="float">
            <text:p>-3.64E-15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3.64E-015" calcext:value-type="float">
            <text:p>3.64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.41E-016" calcext:value-type="float">
            <text:p>1.41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41E-016" calcext:value-type="float">
            <text:p>1.41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2.03E-015" calcext:value-type="float">
            <text:p>-2.03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2.03E-015" calcext:value-type="float">
            <text:p>2.03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3.61E-016" calcext:value-type="float">
            <text:p>3.61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3.61E-016" calcext:value-type="float">
            <text:p>3.61E-16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2.33" calcext:value-type="float">
            <text:p>2.33E+00</text:p>
          </table:table-cell>
          <table:table-cell table:style-name="ce10" office:value-type="float" office:value="0.0625" calcext:value-type="float">
            <text:p>6.25E-02</text:p>
          </table:table-cell>
          <table:table-cell table:style-name="ce10" office:value-type="float" office:value="0.0013" calcext:value-type="float">
            <text:p>1.30E-03</text:p>
          </table:table-cell>
          <table:table-cell table:style-name="ce5" table:formula="of:=[Tabelle4.E10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2.33" calcext:value-type="float">
            <text:p>2.33E+00</text:p>
          </table:table-cell>
          <table:table-cell table:style-name="ce10" office:value-type="float" office:value="0.0312" calcext:value-type="float">
            <text:p>3.12E-02</text:p>
          </table:table-cell>
          <table:table-cell table:style-name="ce10" office:value-type="float" office:value="0.000326" calcext:value-type="float">
            <text:p>3.26E-04</text:p>
          </table:table-cell>
          <table:table-cell table:style-name="ce5" table:formula="of:=[Tabelle4.E109]" office:value-type="float" office:value="1.99" calcext:value-type="float">
            <text:p>1.99</text:p>
          </table:table-cell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2.33" calcext:value-type="float">
            <text:p>2.33E+00</text:p>
          </table:table-cell>
          <table:table-cell table:style-name="ce10" office:value-type="float" office:value="0.0156" calcext:value-type="float">
            <text:p>1.56E-02</text:p>
          </table:table-cell>
          <table:table-cell table:style-name="ce10" office:value-type="float" office:value="0.0000814" calcext:value-type="float">
            <text:p>8.14E-05</text:p>
          </table:table-cell>
          <table:table-cell table:style-name="ce5" table:formula="of:=[Tabelle4.E1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3" calcext:value-type="float">
            <text:p>1.30E-03</text:p>
          </table:table-cell>
          <table:table-cell table:formula="of:=[Tabelle4.E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326" calcext:value-type="float">
            <text:p>3.26E-04</text:p>
          </table:table-cell>
          <table:table-cell table:formula="of:=[Tabelle4.E11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814" calcext:value-type="float">
            <text:p>8.14E-05</text:p>
          </table:table-cell>
          <table:table-cell table:formula="of:=[Tabelle4.E1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4" calcext:value-type="float">
            <text:p>4.14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304" calcext:value-type="float">
            <text:p>3.04E-03</text:p>
          </table:table-cell>
          <table:table-cell table:formula="of:=[Tabelle4.E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76" calcext:value-type="float">
            <text:p>7.60E-04</text:p>
          </table:table-cell>
          <table:table-cell table:formula="of:=[Tabelle4.E1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9" calcext:value-type="float">
            <text:p>1.90E-04</text:p>
          </table:table-cell>
          <table:table-cell table:formula="of:=[Tabelle4.E1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6" calcext:value-type="float">
            <text:p>1.60E-04</text:p>
          </table:table-cell>
          <table:table-cell table:formula="of:=[Tabelle4.E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4" calcext:value-type="float">
            <text:p>4.00E-05</text:p>
          </table:table-cell>
          <table:table-cell table:formula="of:=[Tabelle4.E1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" calcext:value-type="float">
            <text:p>1.00E-05</text:p>
          </table:table-cell>
          <table:table-cell table:formula="of:=[Tabelle4.E1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26" calcext:value-type="float">
            <text:p>2.60E-03</text:p>
          </table:table-cell>
          <table:table-cell table:formula="of:=[Tabelle4.E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651" calcext:value-type="float">
            <text:p>6.51E-04</text:p>
          </table:table-cell>
          <table:table-cell table:formula="of:=[Tabelle4.E121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63" calcext:value-type="float">
            <text:p>1.63E-04</text:p>
          </table:table-cell>
          <table:table-cell table:formula="of:=[Tabelle4.E1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27" calcext:value-type="float">
            <text:p>8.2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304" calcext:value-type="float">
            <text:p>3.04E-03</text:p>
          </table:table-cell>
          <table:table-cell table:formula="of:=[Tabelle4.E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27" calcext:value-type="float">
            <text:p>8.2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76" calcext:value-type="float">
            <text:p>7.60E-04</text:p>
          </table:table-cell>
          <table:table-cell table:formula="of:=[Tabelle4.E1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27" calcext:value-type="float">
            <text:p>8.2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9" calcext:value-type="float">
            <text:p>1.90E-04</text:p>
          </table:table-cell>
          <table:table-cell table:formula="of:=[Tabelle4.E1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.20E+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781" calcext:value-type="float">
            <text:p>7.81E-03</text:p>
          </table:table-cell>
          <table:table-cell table:formula="of:=[Tabelle4.E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.20E+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195" calcext:value-type="float">
            <text:p>1.95E-03</text:p>
          </table:table-cell>
          <table:table-cell table:formula="of:=[Tabelle4.E1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.20E+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488" calcext:value-type="float">
            <text:p>4.88E-04</text:p>
          </table:table-cell>
          <table:table-cell table:formula="of:=[Tabelle4.E1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06" calcext:value-type="float">
            <text:p>2.06E-04</text:p>
          </table:table-cell>
          <table:table-cell table:formula="of:=[Tabelle4.E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515" calcext:value-type="float">
            <text:p>5.15E-05</text:p>
          </table:table-cell>
          <table:table-cell table:formula="of:=[Tabelle4.E1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29" calcext:value-type="float">
            <text:p>1.29E-05</text:p>
          </table:table-cell>
          <table:table-cell table:formula="of:=[Tabelle4.E1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3.0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23" calcext:value-type="float">
            <text:p>2.23E-04</text:p>
          </table:table-cell>
          <table:table-cell table:formula="of:=[Tabelle4.E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558" calcext:value-type="float">
            <text:p>5.58E-05</text:p>
          </table:table-cell>
          <table:table-cell table:formula="of:=[Tabelle4.E133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3.0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4" calcext:value-type="float">
            <text:p>1.40E-05</text:p>
          </table:table-cell>
          <table:table-cell table:formula="of:=[Tabelle4.E134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5" calcext:value-type="float">
            <text:p>1.50E-04</text:p>
          </table:table-cell>
          <table:table-cell table:formula="of:=[Tabelle4.E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75" calcext:value-type="float">
            <text:p>3.75E-05</text:p>
          </table:table-cell>
          <table:table-cell table:formula="of:=[Tabelle4.E13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937" calcext:value-type="float">
            <text:p>9.37E-06</text:p>
          </table:table-cell>
          <table:table-cell table:formula="of:=[Tabelle4.E1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2.3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325" calcext:value-type="float">
            <text:p>3.25E-04</text:p>
          </table:table-cell>
          <table:table-cell table:formula="of:=[Tabelle4.E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2.3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813" calcext:value-type="float">
            <text:p>8.13E-05</text:p>
          </table:table-cell>
          <table:table-cell table:formula="of:=[Tabelle4.E13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2.3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203" calcext:value-type="float">
            <text:p>2.03E-05</text:p>
          </table:table-cell>
          <table:table-cell table:formula="of:=[Tabelle4.E1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26" calcext:value-type="float">
            <text:p>2.60E-05</text:p>
          </table:table-cell>
          <table:table-cell table:formula="of:=[Tabelle4.E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653" calcext:value-type="float">
            <text:p>6.53E-06</text:p>
          </table:table-cell>
          <table:table-cell table:formula="of:=[Tabelle4.E14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163" calcext:value-type="float">
            <text:p>1.63E-06</text:p>
          </table:table-cell>
          <table:table-cell table:formula="of:=[Tabelle4.E143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.21E-016" calcext:value-type="float">
            <text:p>1.21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21E-016" calcext:value-type="float">
            <text:p>1.21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-1.55E-016" calcext:value-type="float">
            <text:p>-1.55E-16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1.55E-016" calcext:value-type="float">
            <text:p>1.55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8.13E-016" calcext:value-type="float">
            <text:p>8.13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8.13E-016" calcext:value-type="float">
            <text:p>8.13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.14E-016" calcext:value-type="float">
            <text:p>1.14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14E-016" calcext:value-type="float">
            <text:p>1.14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4.29E-016" calcext:value-type="float">
            <text:p>4.29E-16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4.29E-016" calcext:value-type="float">
            <text:p>4.29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-1.21E-016" calcext:value-type="float">
            <text:p>-1.21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1.21E-016" calcext:value-type="float">
            <text:p>1.21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.17E-016" calcext:value-type="float">
            <text:p>2.17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2.17E-016" calcext:value-type="float">
            <text:p>2.17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-1.71E-015" calcext:value-type="float">
            <text:p>-1.71E-15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1.71E-015" calcext:value-type="float">
            <text:p>1.71E-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.1E-016" calcext:value-type="float">
            <text:p>6.10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6.1E-016" calcext:value-type="float">
            <text:p>6.10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.07E-016" calcext:value-type="float">
            <text:p>1.07E-16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1.07E-016" calcext:value-type="float">
            <text:p>1.07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3.69E-018" calcext:value-type="float">
            <text:p>-3.69E-18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3.69E-018" calcext:value-type="float">
            <text:p>3.69E-18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5.58E-016" calcext:value-type="float">
            <text:p>-5.58E-16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5.58E-016" calcext:value-type="float">
            <text:p>5.58E-16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7.73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52" calcext:value-type="float">
            <text:p>2.52E-04</text:p>
          </table:table-cell>
          <table:table-cell table:formula="of:=[Tabelle4.E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7.74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63" calcext:value-type="float">
            <text:p>6.30E-05</text:p>
          </table:table-cell>
          <table:table-cell table:formula="of:=[Tabelle4.E1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7.74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57" calcext:value-type="float">
            <text:p>1.57E-05</text:p>
          </table:table-cell>
          <table:table-cell table:formula="of:=[Tabelle4.E1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8" calcext:value-type="float">
            <text:p>8.5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79" calcext:value-type="float">
            <text:p>2.79E-04</text:p>
          </table:table-cell>
          <table:table-cell table:formula="of:=[Tabelle4.E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8" calcext:value-type="float">
            <text:p>8.5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698" calcext:value-type="float">
            <text:p>6.98E-05</text:p>
          </table:table-cell>
          <table:table-cell table:formula="of:=[Tabelle4.E160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8" calcext:value-type="float">
            <text:p>8.5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75" calcext:value-type="float">
            <text:p>1.75E-05</text:p>
          </table:table-cell>
          <table:table-cell table:formula="of:=[Tabelle4.E16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6" calcext:value-type="float">
            <text:p>1.60E-04</text:p>
          </table:table-cell>
          <table:table-cell table:formula="of:=[Tabelle4.E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4" calcext:value-type="float">
            <text:p>4.00E-05</text:p>
          </table:table-cell>
          <table:table-cell table:formula="of:=[Tabelle4.E16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" calcext:value-type="float">
            <text:p>1.00E-05</text:p>
          </table:table-cell>
          <table:table-cell table:formula="of:=[Tabelle4.E16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96" calcext:value-type="float">
            <text:p>3.96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58" calcext:value-type="float">
            <text:p>2.58E-04</text:p>
          </table:table-cell>
          <table:table-cell table:formula="of:=[Tabelle4.E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97" calcext:value-type="float">
            <text:p>3.9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646" calcext:value-type="float">
            <text:p>6.46E-05</text:p>
          </table:table-cell>
          <table:table-cell table:formula="of:=[Tabelle4.E166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97" calcext:value-type="float">
            <text:p>3.9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61" calcext:value-type="float">
            <text:p>1.61E-05</text:p>
          </table:table-cell>
          <table:table-cell table:formula="of:=[Tabelle4.E16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558" calcext:value-type="float">
            <text:p>5.58E-04</text:p>
          </table:table-cell>
          <table:table-cell table:formula="of:=[Tabelle4.E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4" calcext:value-type="float">
            <text:p>1.40E-04</text:p>
          </table:table-cell>
          <table:table-cell table:formula="of:=[Tabelle4.E16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349" calcext:value-type="float">
            <text:p>3.49E-05</text:p>
          </table:table-cell>
          <table:table-cell table:formula="of:=[Tabelle4.E1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87" calcext:value-type="float">
            <text:p>6.87E-04</text:p>
          </table:table-cell>
          <table:table-cell table:formula="of:=[Tabelle4.E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72" calcext:value-type="float">
            <text:p>1.72E-04</text:p>
          </table:table-cell>
          <table:table-cell table:formula="of:=[Tabelle4.E17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29" calcext:value-type="float">
            <text:p>4.29E-05</text:p>
          </table:table-cell>
          <table:table-cell table:formula="of:=[Tabelle4.E17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206" calcext:value-type="float">
            <text:p>2.06E-04</text:p>
          </table:table-cell>
          <table:table-cell table:formula="of:=[Tabelle4.E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515" calcext:value-type="float">
            <text:p>5.15E-05</text:p>
          </table:table-cell>
          <table:table-cell table:formula="of:=[Tabelle4.E1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29" calcext:value-type="float">
            <text:p>1.29E-05</text:p>
          </table:table-cell>
          <table:table-cell table:formula="of:=[Tabelle4.E1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08" calcext:value-type="float">
            <text:p>9.0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591" calcext:value-type="float">
            <text:p>5.91E-04</text:p>
          </table:table-cell>
          <table:table-cell table:formula="of:=[Tabelle4.E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08" calcext:value-type="float">
            <text:p>9.0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48" calcext:value-type="float">
            <text:p>1.48E-04</text:p>
          </table:table-cell>
          <table:table-cell table:formula="of:=[Tabelle4.E178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08" calcext:value-type="float">
            <text:p>9.0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37" calcext:value-type="float">
            <text:p>3.70E-05</text:p>
          </table:table-cell>
          <table:table-cell table:formula="of:=[Tabelle4.E1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05" calcext:value-type="float">
            <text:p>1.05E-04</text:p>
          </table:table-cell>
          <table:table-cell table:formula="of:=[Tabelle4.E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62" calcext:value-type="float">
            <text:p>2.62E-05</text:p>
          </table:table-cell>
          <table:table-cell table:formula="of:=[Tabelle4.E1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655" calcext:value-type="float">
            <text:p>6.55E-06</text:p>
          </table:table-cell>
          <table:table-cell table:formula="of:=[Tabelle4.E1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877" calcext:value-type="float">
            <text:p>8.77E-05</text:p>
          </table:table-cell>
          <table:table-cell table:formula="of:=[Tabelle4.E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19" calcext:value-type="float">
            <text:p>2.19E-05</text:p>
          </table:table-cell>
          <table:table-cell table:formula="of:=[Tabelle4.E1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48" calcext:value-type="float">
            <text:p>5.48E-06</text:p>
          </table:table-cell>
          <table:table-cell table:formula="of:=[Tabelle4.E18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26" calcext:value-type="float">
            <text:p>2.60E-05</text:p>
          </table:table-cell>
          <table:table-cell table:formula="of:=[Tabelle4.E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653" calcext:value-type="float">
            <text:p>6.53E-06</text:p>
          </table:table-cell>
          <table:table-cell table:formula="of:=[Tabelle4.E187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163" calcext:value-type="float">
            <text:p>1.63E-06</text:p>
          </table:table-cell>
          <table:table-cell table:formula="of:=[Tabelle4.E18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74" calcext:value-type="float">
            <text:p>7.74E-02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56" calcext:value-type="float">
            <text:p>7.56E-05</text:p>
          </table:table-cell>
          <table:table-cell table:formula="of:=[Tabelle4.E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74" calcext:value-type="float">
            <text:p>7.74E-02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89" calcext:value-type="float">
            <text:p>1.89E-05</text:p>
          </table:table-cell>
          <table:table-cell table:formula="of:=[Tabelle4.E19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74" calcext:value-type="float">
            <text:p>7.74E-0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473" calcext:value-type="float">
            <text:p>4.73E-06</text:p>
          </table:table-cell>
          <table:table-cell table:formula="of:=[Tabelle4.E191]" office:value-type="float" office:value="2" calcext:value-type="float">
            <text:p>2</text:p>
          </table:table-cell>
        </table:table-row>
      </table:table>
      <table:table table:name="Tabelle4" table:style-name="ta1"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6E-017" calcext:value-type="float">
            <text:p>2.60E-17</text:p>
          </table:table-cell>
          <table:table-cell office:value-type="string" calcext:value-type="string">
            <text:p>&amp;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4.86E-017" calcext:value-type="float">
            <text:p>4.86E-17</text:p>
          </table:table-cell>
          <table:table-cell office:value-type="string" calcext:value-type="string">
            <text:p>&amp;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56E-015" calcext:value-type="float">
            <text:p>1.56E-15</text:p>
          </table:table-cell>
          <table:table-cell office:value-type="string" calcext:value-type="string">
            <text:p>&amp;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4.77E-015" calcext:value-type="float">
            <text:p>4.77E-15</text:p>
          </table:table-cell>
          <table:table-cell office:value-type="string" calcext:value-type="string">
            <text:p>&amp;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6E-016" calcext:value-type="float">
            <text:p>2.60E-16</text:p>
          </table:table-cell>
          <table:table-cell office:value-type="string" calcext:value-type="string">
            <text:p>&amp;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1.14E-016" calcext:value-type="float">
            <text:p>1.14E-16</text:p>
          </table:table-cell>
          <table:table-cell office:value-type="string" calcext:value-type="string">
            <text:p>&amp;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2E-016" calcext:value-type="float">
            <text:p>1.20E-16</text:p>
          </table:table-cell>
          <table:table-cell office:value-type="string" calcext:value-type="string">
            <text:p>&amp;</text:p>
          </table:table-cell>
          <table:table-cell office:value-type="float" office:value="-1.65" calcext:value-type="float">
            <text:p>-1.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3.77E-016" calcext:value-type="float">
            <text:p>3.77E-16</text:p>
          </table:table-cell>
          <table:table-cell office:value-type="string" calcext:value-type="string">
            <text:p>&amp;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4.44E-016" calcext:value-type="float">
            <text:p>4.44E-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22E-016" calcext:value-type="float">
            <text:p>2.22E-16</text:p>
          </table:table-cell>
          <table:table-cell office:value-type="string" calcext:value-type="string">
            <text:p>&amp;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3" calcext:value-type="float">
            <text:p>1.3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26" calcext:value-type="float">
            <text:p>3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52" calcext:value-type="float">
            <text:p>2.5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3" calcext:value-type="float">
            <text:p>6.3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4" calcext:value-type="float">
            <text:p>3.34E-11</text:p>
          </table:table-cell>
          <table:table-cell office:value-type="string" calcext:value-type="string">
            <text:p>&amp;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6" calcext:value-type="float">
            <text:p>3.36E-11</text:p>
          </table:table-cell>
          <table:table-cell office:value-type="string" calcext:value-type="string">
            <text:p>&amp;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26" calcext:value-type="float">
            <text:p>2.6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558" calcext:value-type="float">
            <text:p>5.58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62" calcext:value-type="float">
            <text:p>1.6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04" calcext:value-type="float">
            <text:p>4.04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19" calcext:value-type="float">
            <text:p>1.1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98" calcext:value-type="float">
            <text:p>2.9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23" calcext:value-type="float">
            <text:p>2.23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58" calcext:value-type="float">
            <text:p>5.58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05" calcext:value-type="float">
            <text:p>1.05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62" calcext:value-type="float">
            <text:p>2.62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14E-015" calcext:value-type="float">
            <text:p>1.14E-15</text:p>
          </table:table-cell>
          <table:table-cell office:value-type="string" calcext:value-type="string">
            <text:p>&amp;</text:p>
          </table:table-cell>
          <table:table-cell office:value-type="float" office:value="-1.91" calcext:value-type="float">
            <text:p>-1.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4.3E-015" calcext:value-type="float">
            <text:p>4.30E-15</text:p>
          </table:table-cell>
          <table:table-cell office:value-type="string" calcext:value-type="string">
            <text:p>&amp;</text:p>
          </table:table-cell>
          <table:table-cell office:value-type="float" office:value="-1.78" calcext:value-type="float">
            <text:p>-1.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3.68E-016" calcext:value-type="float">
            <text:p>3.68E-16</text:p>
          </table:table-cell>
          <table:table-cell office:value-type="string" calcext:value-type="string">
            <text:p>&amp;</text:p>
          </table:table-cell>
          <table:table-cell office:value-type="float" office:value="-1.92" calcext:value-type="float">
            <text:p>-1.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1.4E-015" calcext:value-type="float">
            <text:p>1.40E-15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43E-015" calcext:value-type="float">
            <text:p>2.43E-15</text:p>
          </table:table-cell>
          <table:table-cell office:value-type="string" calcext:value-type="string">
            <text:p>&amp;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98E-015" calcext:value-type="float">
            <text:p>2.98E-15</text:p>
          </table:table-cell>
          <table:table-cell office:value-type="string" calcext:value-type="string">
            <text:p>&amp;</text:p>
          </table:table-cell>
          <table:table-cell office:value-type="float" office:value="-2.67" calcext:value-type="float">
            <text:p>-2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6.42E-017" calcext:value-type="float">
            <text:p>6.42E-17</text:p>
          </table:table-cell>
          <table:table-cell office:value-type="string" calcext:value-type="string">
            <text:p>&amp;</text:p>
          </table:table-cell>
          <table:table-cell office:value-type="float" office:value="-2.69" calcext:value-type="float">
            <text:p>-2.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4.15E-016" calcext:value-type="float">
            <text:p>4.15E-16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8.88E-016" calcext:value-type="float">
            <text:p>8.88E-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2" calcext:value-type="float">
            <text:p>3.32E-11</text:p>
          </table:table-cell>
          <table:table-cell office:value-type="string" calcext:value-type="string">
            <text:p>&amp;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3" calcext:value-type="float">
            <text:p>1.3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26" calcext:value-type="float">
            <text:p>3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79" calcext:value-type="float">
            <text:p>2.7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98" calcext:value-type="float">
            <text:p>6.9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4" calcext:value-type="float">
            <text:p>3.34E-11</text:p>
          </table:table-cell>
          <table:table-cell office:value-type="string" calcext:value-type="string">
            <text:p>&amp;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6" calcext:value-type="float">
            <text:p>3.36E-11</text:p>
          </table:table-cell>
          <table:table-cell office:value-type="string" calcext:value-type="string">
            <text:p>&amp;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8.88E-016" calcext:value-type="float">
            <text:p>8.88E-16</text:p>
          </table:table-cell>
          <table:table-cell office:value-type="string" calcext:value-type="string">
            <text:p>&amp;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66E-015" calcext:value-type="float">
            <text:p>2.66E-15</text:p>
          </table:table-cell>
          <table:table-cell office:value-type="string" calcext:value-type="string">
            <text:p>&amp;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304" calcext:value-type="float">
            <text:p>3.04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76" calcext:value-type="float">
            <text:p>7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87" calcext:value-type="float">
            <text:p>6.8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72" calcext:value-type="float">
            <text:p>1.7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19" calcext:value-type="float">
            <text:p>1.1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98" calcext:value-type="float">
            <text:p>2.9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5" calcext:value-type="float">
            <text:p>2.5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75" calcext:value-type="float">
            <text:p>3.7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877" calcext:value-type="float">
            <text:p>8.77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19" calcext:value-type="float">
            <text:p>2.1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9.26E-016" calcext:value-type="float">
            <text:p>9.26E-16</text:p>
          </table:table-cell>
          <table:table-cell office:value-type="string" calcext:value-type="string">
            <text:p>&amp;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1.18E-015" calcext:value-type="float">
            <text:p>1.18E-15</text:p>
          </table:table-cell>
          <table:table-cell office:value-type="string" calcext:value-type="string">
            <text:p>&amp;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8E-015" calcext:value-type="float">
            <text:p>1.80E-15</text:p>
          </table:table-cell>
          <table:table-cell office:value-type="string" calcext:value-type="string">
            <text:p>&amp;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38E-015" calcext:value-type="float">
            <text:p>2.38E-15</text:p>
          </table:table-cell>
          <table:table-cell office:value-type="string" calcext:value-type="string">
            <text:p>&amp;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06E-015" calcext:value-type="float">
            <text:p>1.06E-15</text:p>
          </table:table-cell>
          <table:table-cell office:value-type="string" calcext:value-type="string">
            <text:p>&amp;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5.41E-016" calcext:value-type="float">
            <text:p>5.41E-16</text:p>
          </table:table-cell>
          <table:table-cell office:value-type="string" calcext:value-type="string">
            <text:p>&amp;</text:p>
          </table:table-cell>
          <table:table-cell office:value-type="float" office:value="-2.75" calcext:value-type="float">
            <text:p>-2.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41E-016" calcext:value-type="float">
            <text:p>1.41E-16</text:p>
          </table:table-cell>
          <table:table-cell office:value-type="string" calcext:value-type="string">
            <text:p>&amp;</text:p>
          </table:table-cell>
          <table:table-cell office:value-type="float" office:value="-3.84" calcext:value-type="float">
            <text:p>-3.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03E-015" calcext:value-type="float">
            <text:p>2.03E-15</text:p>
          </table:table-cell>
          <table:table-cell office:value-type="string" calcext:value-type="string">
            <text:p>&amp;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3" calcext:value-type="float">
            <text:p>1.3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26" calcext:value-type="float">
            <text:p>3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3" calcext:value-type="float">
            <text:p>1.3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26" calcext:value-type="float">
            <text:p>3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304" calcext:value-type="float">
            <text:p>3.04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76" calcext:value-type="float">
            <text:p>7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6" calcext:value-type="float">
            <text:p>1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" calcext:value-type="float">
            <text:p>4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26" calcext:value-type="float">
            <text:p>2.6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304" calcext:value-type="float">
            <text:p>3.04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76" calcext:value-type="float">
            <text:p>7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781" calcext:value-type="float">
            <text:p>7.81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195" calcext:value-type="float">
            <text:p>1.95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06" calcext:value-type="float">
            <text:p>2.0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15" calcext:value-type="float">
            <text:p>5.1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23" calcext:value-type="float">
            <text:p>2.23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58" calcext:value-type="float">
            <text:p>5.58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75" calcext:value-type="float">
            <text:p>3.7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25" calcext:value-type="float">
            <text:p>3.25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813" calcext:value-type="float">
            <text:p>8.13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26" calcext:value-type="float">
            <text:p>2.60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653" calcext:value-type="float">
            <text:p>6.53E-0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21E-016" calcext:value-type="float">
            <text:p>1.21E-16</text:p>
          </table:table-cell>
          <table:table-cell office:value-type="string" calcext:value-type="string">
            <text:p>&amp;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1.55E-016" calcext:value-type="float">
            <text:p>1.55E-16</text:p>
          </table:table-cell>
          <table:table-cell office:value-type="string" calcext:value-type="string">
            <text:p>&amp;</text:p>
          </table:table-cell>
          <table:table-cell office:value-type="float" office:value="-2.39" calcext:value-type="float">
            <text:p>-2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14E-016" calcext:value-type="float">
            <text:p>1.14E-16</text:p>
          </table:table-cell>
          <table:table-cell office:value-type="string" calcext:value-type="string">
            <text:p>&amp;</text:p>
          </table:table-cell>
          <table:table-cell office:value-type="float" office:value="-1.91" calcext:value-type="float">
            <text:p>-1.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4.29E-016" calcext:value-type="float">
            <text:p>4.29E-16</text:p>
          </table:table-cell>
          <table:table-cell office:value-type="string" calcext:value-type="string">
            <text:p>&amp;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17E-016" calcext:value-type="float">
            <text:p>2.17E-16</text:p>
          </table:table-cell>
          <table:table-cell office:value-type="string" calcext:value-type="string">
            <text:p>&amp;</text:p>
          </table:table-cell>
          <table:table-cell office:value-type="float" office:value="-2.97" calcext:value-type="float">
            <text:p>-2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1.71E-015" calcext:value-type="float">
            <text:p>1.71E-15</text:p>
          </table:table-cell>
          <table:table-cell office:value-type="string" calcext:value-type="string">
            <text:p>&amp;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07E-016" calcext:value-type="float">
            <text:p>1.07E-16</text:p>
          </table:table-cell>
          <table:table-cell office:value-type="string" calcext:value-type="string">
            <text:p>&amp;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3.69E-018" calcext:value-type="float">
            <text:p>3.69E-18</text:p>
          </table:table-cell>
          <table:table-cell office:value-type="string" calcext:value-type="string">
            <text:p>&amp;</text:p>
          </table:table-cell>
          <table:table-cell office:value-type="float" office:value="-7.24" calcext:value-type="float">
            <text:p>-7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52" calcext:value-type="float">
            <text:p>2.5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3" calcext:value-type="float">
            <text:p>6.3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79" calcext:value-type="float">
            <text:p>2.7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98" calcext:value-type="float">
            <text:p>6.9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6" calcext:value-type="float">
            <text:p>1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" calcext:value-type="float">
            <text:p>4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58" calcext:value-type="float">
            <text:p>2.58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46" calcext:value-type="float">
            <text:p>6.46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558" calcext:value-type="float">
            <text:p>5.58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87" calcext:value-type="float">
            <text:p>6.8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72" calcext:value-type="float">
            <text:p>1.7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06" calcext:value-type="float">
            <text:p>2.0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15" calcext:value-type="float">
            <text:p>5.1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591" calcext:value-type="float">
            <text:p>5.9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48" calcext:value-type="float">
            <text:p>1.4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05" calcext:value-type="float">
            <text:p>1.05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62" calcext:value-type="float">
            <text:p>2.62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877" calcext:value-type="float">
            <text:p>8.77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19" calcext:value-type="float">
            <text:p>2.1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26" calcext:value-type="float">
            <text:p>2.60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653" calcext:value-type="float">
            <text:p>6.53E-0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56" calcext:value-type="float">
            <text:p>7.56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89" calcext:value-type="float">
            <text:p>1.8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</table:table>
      <table:table table:name="Tabelle1" table:style-name="ta1">
        <table:table-column table:style-name="co1" table:number-columns-repeated="5" table:default-cell-style-name="ce2"/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83" calcext:value-type="float">
            <text:p>6.83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683" calcext:value-type="float">
            <text:p>6.83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01" calcext:value-type="float">
            <text:p>2.01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201" calcext:value-type="float">
            <text:p>2.01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1" calcext:value-type="float">
            <text:p>1.11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11" calcext:value-type="float">
            <text:p>1.11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792" calcext:value-type="float">
            <text:p>7.92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792" calcext:value-type="float">
            <text:p>7.92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338" calcext:value-type="float">
            <text:p>3.38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338" calcext:value-type="float">
            <text:p>3.38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14" calcext:value-type="float">
            <text:p>1.40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4" calcext:value-type="float">
            <text:p>1.40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2E-015" calcext:value-type="float">
            <text:p>1.72E-15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1.72E-015" calcext:value-type="float">
            <text:p>1.72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5E-015" calcext:value-type="float">
            <text:p>4.50E-15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4.5E-015" calcext:value-type="float">
            <text:p>4.50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181" calcext:value-type="float">
            <text:p>-1.81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181" calcext:value-type="float">
            <text:p>1.81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00724" calcext:value-type="float">
            <text:p>7.24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724" calcext:value-type="float">
            <text:p>7.24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0188" calcext:value-type="float">
            <text:p>1.88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188" calcext:value-type="float">
            <text:p>1.88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119" calcext:value-type="float">
            <text:p>1.19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19" calcext:value-type="float">
            <text:p>1.19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999" calcext:value-type="float">
            <text:p>9.99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999" calcext:value-type="float">
            <text:p>9.99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455" calcext:value-type="float">
            <text:p>4.55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455" calcext:value-type="float">
            <text:p>4.55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178" calcext:value-type="float">
            <text:p>1.78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78" calcext:value-type="float">
            <text:p>1.78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9E-015" calcext:value-type="float">
            <text:p>2.29E-15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2.29E-015" calcext:value-type="float">
            <text:p>2.29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00116" calcext:value-type="float">
            <text:p>1.16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116" calcext:value-type="float">
            <text:p>1.16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189" calcext:value-type="float">
            <text:p>-1.89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189" calcext:value-type="float">
            <text:p>1.89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02" calcext:value-type="float">
            <text:p>8.02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802" calcext:value-type="float">
            <text:p>8.02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73" calcext:value-type="float">
            <text:p>1.73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173" calcext:value-type="float">
            <text:p>1.73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36" calcext:value-type="float">
            <text:p>1.36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36" calcext:value-type="float">
            <text:p>1.36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0135" calcext:value-type="float">
            <text:p>1.35E-13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135" calcext:value-type="float">
            <text:p>1.35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0655" calcext:value-type="float">
            <text:p>6.55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655" calcext:value-type="float">
            <text:p>6.55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243" calcext:value-type="float">
            <text:p>2.43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243" calcext:value-type="float">
            <text:p>2.43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97E-015" calcext:value-type="float">
            <text:p>2.97E-15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2.97E-015" calcext:value-type="float">
            <text:p>2.97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00234" calcext:value-type="float">
            <text:p>2.34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234" calcext:value-type="float">
            <text:p>2.34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224" calcext:value-type="float">
            <text:p>-2.24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224" calcext:value-type="float">
            <text:p>2.24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85" calcext:value-type="float">
            <text:p>2.85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285" calcext:value-type="float">
            <text:p>2.85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32" calcext:value-type="float">
            <text:p>8.32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832" calcext:value-type="float">
            <text:p>8.32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57" calcext:value-type="float">
            <text:p>4.57E-13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457" calcext:value-type="float">
            <text:p>4.57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344" calcext:value-type="float">
            <text:p>3.44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344" calcext:value-type="float">
            <text:p>3.44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16" calcext:value-type="float">
            <text:p>1.60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16" calcext:value-type="float">
            <text:p>1.60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647" calcext:value-type="float">
            <text:p>6.47E-13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647" calcext:value-type="float">
            <text:p>6.47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69E-015" calcext:value-type="float">
            <text:p>1.69E-15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1.69E-015" calcext:value-type="float">
            <text:p>1.69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9.99E-016" calcext:value-type="float">
            <text:p>-9.99E-16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9.99E-016" calcext:value-type="float">
            <text:p>9.99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.0000000000000118" calcext:value-type="float">
            <text:p>-1.18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118" calcext:value-type="float">
            <text:p>1.18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89" calcext:value-type="float">
            <text:p>5.89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589" calcext:value-type="float">
            <text:p>5.89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6" calcext:value-type="float">
            <text:p>1.60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16" calcext:value-type="float">
            <text:p>1.60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3" calcext:value-type="float">
            <text:p>1.03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03" calcext:value-type="float">
            <text:p>1.03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358" calcext:value-type="float">
            <text:p>3.58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358" calcext:value-type="float">
            <text:p>3.58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194" calcext:value-type="float">
            <text:p>1.94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194" calcext:value-type="float">
            <text:p>1.94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62" calcext:value-type="float">
            <text:p>6.20E-13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62" calcext:value-type="float">
            <text:p>6.20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12E-016" calcext:value-type="float">
            <text:p>-2.12E-16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2.12E-016" calcext:value-type="float">
            <text:p>2.12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8.47E-016" calcext:value-type="float">
            <text:p>-8.47E-16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8.47E-016" calcext:value-type="float">
            <text:p>8.47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721" calcext:value-type="float">
            <text:p>-7.21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721" calcext:value-type="float">
            <text:p>7.21E-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.0000000000000586" calcext:value-type="float">
            <text:p>5.86E-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.000000000000132" calcext:value-type="float">
            <text:p>1.32E-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.00000000000114" calcext:value-type="float">
            <text:p>1.14E-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2.33" calcext:value-type="float">
            <text:p>2.33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.0013" calcext:value-type="float">
            <text:p>1.30E-03</text:p>
          </table:table-cell>
          <table:table-cell table:style-name="ce3" table:formula="of:=[Tabelle2.E66]" office:value-type="float" office:value="0" calcext:value-type="float">
            <text:p>0</text:p>
          </table:table-cell>
          <table:table-cell table:style-name="ce5" office:value-type="string" calcext:value-type="string">
            <text:p>Quadraturformel sollte exakt sein….</text:p>
          </table:table-cell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2.33" calcext:value-type="float">
            <text:p>2.33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.000326" calcext:value-type="float">
            <text:p>3.26E-04</text:p>
          </table:table-cell>
          <table:table-cell table:style-name="ce3" table:formula="of:=[Tabelle2.E67]" office:value-type="float" office:value="1.99" calcext:value-type="float">
            <text:p>1.99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2.33" calcext:value-type="float">
            <text:p>2.33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.0000814" calcext:value-type="float">
            <text:p>8.14E-05</text:p>
          </table:table-cell>
          <table:table-cell table:style-name="ce3" table:formula="of:=[Tabelle2.E68]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73" calcext:value-type="float">
            <text:p>7.73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252" calcext:value-type="float">
            <text:p>2.52E-04</text:p>
          </table:table-cell>
          <table:table-cell table:style-name="ce4" table:formula="of:=[Tabelle2.E6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74" calcext:value-type="float">
            <text:p>7.74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63" calcext:value-type="float">
            <text:p>6.30E-05</text:p>
          </table:table-cell>
          <table:table-cell table:style-name="ce4" table:formula="of:=[Tabelle2.E70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74" calcext:value-type="float">
            <text:p>7.74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57" calcext:value-type="float">
            <text:p>1.57E-05</text:p>
          </table:table-cell>
          <table:table-cell table:style-name="ce4" table:formula="of:=[Tabelle2.E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67" calcext:value-type="float">
            <text:p>4.6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333" calcext:value-type="float">
            <text:p>3.33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67" calcext:value-type="float">
            <text:p>4.6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334" calcext:value-type="float">
            <text:p>3.34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67" calcext:value-type="float">
            <text:p>4.6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325" calcext:value-type="float">
            <text:p>3.25E-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.00E+00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26" calcext:value-type="float">
            <text:p>2.60E-03</text:p>
          </table:table-cell>
          <table:table-cell table:style-name="ce4" table:formula="of:=[Tabelle2.E7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.00E+00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651" calcext:value-type="float">
            <text:p>6.51E-04</text:p>
          </table:table-cell>
          <table:table-cell table:style-name="ce4" table:formula="of:=[Tabelle2.E79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.00E+00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163" calcext:value-type="float">
            <text:p>1.63E-04</text:p>
          </table:table-cell>
          <table:table-cell table:style-name="ce4" table:formula="of:=[Tabelle2.E80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558" calcext:value-type="float">
            <text:p>5.58E-04</text:p>
          </table:table-cell>
          <table:table-cell table:style-name="ce4" table:formula="of:=[Tabelle2.E8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14" calcext:value-type="float">
            <text:p>1.40E-04</text:p>
          </table:table-cell>
          <table:table-cell table:style-name="ce4" table:formula="of:=[Tabelle2.E82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349" calcext:value-type="float">
            <text:p>3.49E-05</text:p>
          </table:table-cell>
          <table:table-cell table:style-name="ce4" table:formula="of:=[Tabelle2.E83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497" calcext:value-type="float">
            <text:p>4.97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62" calcext:value-type="float">
            <text:p>1.62E-04</text:p>
          </table:table-cell>
          <table:table-cell table:style-name="ce4" table:formula="of:=[Tabelle2.E8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497" calcext:value-type="float">
            <text:p>4.97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404" calcext:value-type="float">
            <text:p>4.04E-05</text:p>
          </table:table-cell>
          <table:table-cell table:style-name="ce4" table:formula="of:=[Tabelle2.E8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497" calcext:value-type="float">
            <text:p>4.97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01" calcext:value-type="float">
            <text:p>1.01E-05</text:p>
          </table:table-cell>
          <table:table-cell table:style-name="ce4" table:formula="of:=[Tabelle2.E86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365" calcext:value-type="float">
            <text:p>3.65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19" calcext:value-type="float">
            <text:p>1.19E-04</text:p>
          </table:table-cell>
          <table:table-cell table:style-name="ce4" table:formula="of:=[Tabelle2.E8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366" calcext:value-type="float">
            <text:p>3.66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298" calcext:value-type="float">
            <text:p>2.98E-05</text:p>
          </table:table-cell>
          <table:table-cell table:style-name="ce4" table:formula="of:=[Tabelle2.E88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366" calcext:value-type="float">
            <text:p>3.66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0744" calcext:value-type="float">
            <text:p>7.44E-06</text:p>
          </table:table-cell>
          <table:table-cell table:style-name="ce4" table:formula="of:=[Tabelle2.E8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08" calcext:value-type="float">
            <text:p>3.08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223" calcext:value-type="float">
            <text:p>2.23E-04</text:p>
          </table:table-cell>
          <table:table-cell table:style-name="ce4" table:formula="of:=[Tabelle2.E9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07" calcext:value-type="float">
            <text:p>3.07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558" calcext:value-type="float">
            <text:p>5.58E-05</text:p>
          </table:table-cell>
          <table:table-cell table:style-name="ce4" table:formula="of:=[Tabelle2.E91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07" calcext:value-type="float">
            <text:p>3.07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4" calcext:value-type="float">
            <text:p>1.40E-05</text:p>
          </table:table-cell>
          <table:table-cell table:style-name="ce4" table:formula="of:=[Tabelle2.E92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float" office:value="0.161" calcext:value-type="float">
            <text:p>1.61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05" calcext:value-type="float">
            <text:p>1.05E-04</text:p>
          </table:table-cell>
          <table:table-cell table:style-name="ce4" table:formula="of:=[Tabelle2.E9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float" office:value="0.161" calcext:value-type="float">
            <text:p>1.61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262" calcext:value-type="float">
            <text:p>2.62E-05</text:p>
          </table:table-cell>
          <table:table-cell table:style-name="ce4" table:formula="of:=[Tabelle2.E9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float" office:value="0.161" calcext:value-type="float">
            <text:p>1.61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0655" calcext:value-type="float">
            <text:p>6.55E-06</text:p>
          </table:table-cell>
          <table:table-cell table:style-name="ce4" table:formula="of:=[Tabelle2.E9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33" calcext:value-type="float">
            <text:p>7.33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733" calcext:value-type="float">
            <text:p>7.33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99" calcext:value-type="float">
            <text:p>6.99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699" calcext:value-type="float">
            <text:p>6.99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6" calcext:value-type="float">
            <text:p>1.06E-12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106" calcext:value-type="float">
            <text:p>1.06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697" calcext:value-type="float">
            <text:p>6.97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697" calcext:value-type="float">
            <text:p>6.97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397" calcext:value-type="float">
            <text:p>3.97E-13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397" calcext:value-type="float">
            <text:p>3.97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914" calcext:value-type="float">
            <text:p>9.14E-13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914" calcext:value-type="float">
            <text:p>9.14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0013" calcext:value-type="float">
            <text:p>1.30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13" calcext:value-type="float">
            <text:p>1.30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145" calcext:value-type="float">
            <text:p>-1.45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145" calcext:value-type="float">
            <text:p>1.45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349" calcext:value-type="float">
            <text:p>-3.49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349" calcext:value-type="float">
            <text:p>3.49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7" calcext:value-type="float">
            <text:p>4.6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332" calcext:value-type="float">
            <text:p>3.32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7" calcext:value-type="float">
            <text:p>4.6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333" calcext:value-type="float">
            <text:p>3.33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7" calcext:value-type="float">
            <text:p>4.6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321" calcext:value-type="float">
            <text:p>3.21E-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.00E+00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26" calcext:value-type="float">
            <text:p>2.60E-03</text:p>
          </table:table-cell>
          <table:table-cell table:style-name="ce4" table:formula="of:=[Tabelle2.E1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.00E+00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651" calcext:value-type="float">
            <text:p>6.51E-04</text:p>
          </table:table-cell>
          <table:table-cell table:style-name="ce4" table:formula="of:=[Tabelle2.E115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.00E+00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163" calcext:value-type="float">
            <text:p>1.63E-04</text:p>
          </table:table-cell>
          <table:table-cell table:style-name="ce4" table:formula="of:=[Tabelle2.E116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558" calcext:value-type="float">
            <text:p>5.58E-04</text:p>
          </table:table-cell>
          <table:table-cell table:style-name="ce4" table:formula="of:=[Tabelle2.E1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14" calcext:value-type="float">
            <text:p>1.40E-04</text:p>
          </table:table-cell>
          <table:table-cell table:style-name="ce4" table:formula="of:=[Tabelle2.E118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349" calcext:value-type="float">
            <text:p>3.49E-05</text:p>
          </table:table-cell>
          <table:table-cell table:style-name="ce4" table:formula="of:=[Tabelle2.E11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9.34" calcext:value-type="float">
            <text:p>9.34E+00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26" calcext:value-type="float">
            <text:p>2.60E-03</text:p>
          </table:table-cell>
          <table:table-cell table:style-name="ce4" table:formula="of:=[Tabelle2.E1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9.33" calcext:value-type="float">
            <text:p>9.33E+00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651" calcext:value-type="float">
            <text:p>6.51E-04</text:p>
          </table:table-cell>
          <table:table-cell table:style-name="ce4" table:formula="of:=[Tabelle2.E121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9.33" calcext:value-type="float">
            <text:p>9.33E+00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163" calcext:value-type="float">
            <text:p>1.63E-04</text:p>
          </table:table-cell>
          <table:table-cell table:style-name="ce4" table:formula="of:=[Tabelle2.E12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" calcext:value-type="float">
            <text:p>1.20E+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26" calcext:value-type="float">
            <text:p>2.60E-03</text:p>
          </table:table-cell>
          <table:table-cell table:style-name="ce4" table:formula="of:=[Tabelle2.E12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" calcext:value-type="float">
            <text:p>1.20E+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651" calcext:value-type="float">
            <text:p>6.51E-04</text:p>
          </table:table-cell>
          <table:table-cell table:style-name="ce4" table:formula="of:=[Tabelle2.E124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" calcext:value-type="float">
            <text:p>1.20E+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163" calcext:value-type="float">
            <text:p>1.63E-04</text:p>
          </table:table-cell>
          <table:table-cell table:style-name="ce4" table:formula="of:=[Tabelle2.E12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8" office:value-type="float" office:value="16.5" calcext:value-type="float">
            <text:p>1.65E+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911" calcext:value-type="float">
            <text:p>9.11E-03</text:p>
          </table:table-cell>
          <table:table-cell table:style-name="ce4" table:formula="of:=[Tabelle2.E1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8" office:value-type="float" office:value="16.5" calcext:value-type="float">
            <text:p>1.65E+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228" calcext:value-type="float">
            <text:p>2.28E-03</text:p>
          </table:table-cell>
          <table:table-cell table:style-name="ce4" table:formula="of:=[Tabelle2.E127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8" office:value-type="float" office:value="16.5" calcext:value-type="float">
            <text:p>1.65E+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57" calcext:value-type="float">
            <text:p>5.70E-04</text:p>
          </table:table-cell>
          <table:table-cell table:style-name="ce4" table:formula="of:=[Tabelle2.E12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.22" calcext:value-type="float">
            <text:p>4.22E+00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366" calcext:value-type="float">
            <text:p>3.66E-04</text:p>
          </table:table-cell>
          <table:table-cell table:style-name="ce4" table:formula="of:=[Tabelle2.E12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.22" calcext:value-type="float">
            <text:p>4.22E+00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917" calcext:value-type="float">
            <text:p>9.17E-05</text:p>
          </table:table-cell>
          <table:table-cell table:style-name="ce4" table:formula="of:=[Tabelle2.E130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.22" calcext:value-type="float">
            <text:p>4.22E+00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229" calcext:value-type="float">
            <text:p>2.29E-05</text:p>
          </table:table-cell>
          <table:table-cell table:style-name="ce4" table:formula="of:=[Tabelle2.E13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73" calcext:value-type="float">
            <text:p>7.30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742" calcext:value-type="float">
            <text:p>7.42E-04</text:p>
          </table:table-cell>
          <table:table-cell table:style-name="ce4" table:formula="of:=[Tabelle2.E1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731" calcext:value-type="float">
            <text:p>7.31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185" calcext:value-type="float">
            <text:p>1.85E-04</text:p>
          </table:table-cell>
          <table:table-cell table:style-name="ce4" table:formula="of:=[Tabelle2.E133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731" calcext:value-type="float">
            <text:p>7.31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464" calcext:value-type="float">
            <text:p>4.64E-05</text:p>
          </table:table-cell>
          <table:table-cell table:style-name="ce4" table:formula="of:=[Tabelle2.E13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14" calcext:value-type="float">
            <text:p>6.14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759" calcext:value-type="float">
            <text:p>7.59E-04</text:p>
          </table:table-cell>
          <table:table-cell table:style-name="ce4" table:formula="of:=[Tabelle2.E1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14" calcext:value-type="float">
            <text:p>6.14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19" calcext:value-type="float">
            <text:p>1.90E-04</text:p>
          </table:table-cell>
          <table:table-cell table:style-name="ce4" table:formula="of:=[Tabelle2.E136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15" calcext:value-type="float">
            <text:p>6.15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474" calcext:value-type="float">
            <text:p>4.74E-05</text:p>
          </table:table-cell>
          <table:table-cell table:style-name="ce4" table:formula="of:=[Tabelle2.E137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541" calcext:value-type="float">
            <text:p>5.41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387" calcext:value-type="float">
            <text:p>3.87E-04</text:p>
          </table:table-cell>
          <table:table-cell table:style-name="ce4" table:formula="of:=[Tabelle2.E13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541" calcext:value-type="float">
            <text:p>5.41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968" calcext:value-type="float">
            <text:p>9.68E-05</text:p>
          </table:table-cell>
          <table:table-cell table:style-name="ce4" table:formula="of:=[Tabelle2.E139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541" calcext:value-type="float">
            <text:p>5.41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242" calcext:value-type="float">
            <text:p>2.42E-05</text:p>
          </table:table-cell>
          <table:table-cell table:style-name="ce4" table:formula="of:=[Tabelle2.E140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float" office:value="0.269" calcext:value-type="float">
            <text:p>2.69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386" calcext:value-type="float">
            <text:p>3.86E-04</text:p>
          </table:table-cell>
          <table:table-cell table:style-name="ce4" table:formula="of:=[Tabelle2.E14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float" office:value="0.269" calcext:value-type="float">
            <text:p>2.69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965" calcext:value-type="float">
            <text:p>9.65E-05</text:p>
          </table:table-cell>
          <table:table-cell table:style-name="ce4" table:formula="of:=[Tabelle2.E14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float" office:value="0.269" calcext:value-type="float">
            <text:p>2.69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241" calcext:value-type="float">
            <text:p>2.41E-05</text:p>
          </table:table-cell>
          <table:table-cell table:style-name="ce4" table:formula="of:=[Tabelle2.E14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E-016" calcext:value-type="float">
            <text:p>4.02E-16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4.02E-016" calcext:value-type="float">
            <text:p>4.02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4E-016" calcext:value-type="float">
            <text:p>-9.54E-16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9.54E-016" calcext:value-type="float">
            <text:p>9.54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E-015" calcext:value-type="float">
            <text:p>5.04E-15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5.04E-015" calcext:value-type="float">
            <text:p>5.04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36" calcext:value-type="float">
            <text:p>2.36E-14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000000000236" calcext:value-type="float">
            <text:p>2.36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926" calcext:value-type="float">
            <text:p>9.26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926" calcext:value-type="float">
            <text:p>9.26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24" calcext:value-type="float">
            <text:p>4.24E-13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424" calcext:value-type="float">
            <text:p>4.24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1E-015" calcext:value-type="float">
            <text:p>3.21E-15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3.21E-015" calcext:value-type="float">
            <text:p>3.21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553" calcext:value-type="float">
            <text:p>5.53E-14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000000000553" calcext:value-type="float">
            <text:p>5.53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175" calcext:value-type="float">
            <text:p>1.75E-13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175" calcext:value-type="float">
            <text:p>1.75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94E-016" calcext:value-type="float">
            <text:p>3.94E-16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3.94E-016" calcext:value-type="float">
            <text:p>3.94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.62E-015" calcext:value-type="float">
            <text:p>-5.62E-15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5.62E-015" calcext:value-type="float">
            <text:p>5.62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301" calcext:value-type="float">
            <text:p>-3.01E-14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00000000301" calcext:value-type="float">
            <text:p>3.01E-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497" calcext:value-type="float">
            <text:p>4.97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62" calcext:value-type="float">
            <text:p>1.62E-04</text:p>
          </table:table-cell>
          <table:table-cell table:style-name="ce4" table:formula="of:=[Tabelle2.E15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497" calcext:value-type="float">
            <text:p>4.97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404" calcext:value-type="float">
            <text:p>4.04E-05</text:p>
          </table:table-cell>
          <table:table-cell table:style-name="ce4" table:formula="of:=[Tabelle2.E157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497" calcext:value-type="float">
            <text:p>4.97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01" calcext:value-type="float">
            <text:p>1.01E-05</text:p>
          </table:table-cell>
          <table:table-cell table:style-name="ce4" table:formula="of:=[Tabelle2.E15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0.365" calcext:value-type="float">
            <text:p>3.65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19" calcext:value-type="float">
            <text:p>1.19E-04</text:p>
          </table:table-cell>
          <table:table-cell table:style-name="ce4" table:formula="of:=[Tabelle2.E15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0.366" calcext:value-type="float">
            <text:p>3.66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298" calcext:value-type="float">
            <text:p>2.98E-05</text:p>
          </table:table-cell>
          <table:table-cell table:style-name="ce4" table:formula="of:=[Tabelle2.E160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0.366" calcext:value-type="float">
            <text:p>3.66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0744" calcext:value-type="float">
            <text:p>7.44E-06</text:p>
          </table:table-cell>
          <table:table-cell table:style-name="ce4" table:formula="of:=[Tabelle2.E16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08" calcext:value-type="float">
            <text:p>3.08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223" calcext:value-type="float">
            <text:p>2.23E-04</text:p>
          </table:table-cell>
          <table:table-cell table:style-name="ce4" table:formula="of:=[Tabelle2.E16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07" calcext:value-type="float">
            <text:p>3.07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558" calcext:value-type="float">
            <text:p>5.58E-05</text:p>
          </table:table-cell>
          <table:table-cell table:style-name="ce4" table:formula="of:=[Tabelle2.E163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07" calcext:value-type="float">
            <text:p>3.07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4" calcext:value-type="float">
            <text:p>1.40E-05</text:p>
          </table:table-cell>
          <table:table-cell table:style-name="ce4" table:formula="of:=[Tabelle2.E164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161" calcext:value-type="float">
            <text:p>1.61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05" calcext:value-type="float">
            <text:p>1.05E-04</text:p>
          </table:table-cell>
          <table:table-cell table:style-name="ce4" table:formula="of:=[Tabelle2.E16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161" calcext:value-type="float">
            <text:p>1.61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262" calcext:value-type="float">
            <text:p>2.62E-05</text:p>
          </table:table-cell>
          <table:table-cell table:style-name="ce4" table:formula="of:=[Tabelle2.E166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161" calcext:value-type="float">
            <text:p>1.61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0655" calcext:value-type="float">
            <text:p>6.55E-06</text:p>
          </table:table-cell>
          <table:table-cell table:style-name="ce4" table:formula="of:=[Tabelle2.E167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73" calcext:value-type="float">
            <text:p>7.30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742" calcext:value-type="float">
            <text:p>7.42E-04</text:p>
          </table:table-cell>
          <table:table-cell table:style-name="ce4" table:formula="of:=[Tabelle2.E16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731" calcext:value-type="float">
            <text:p>7.31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185" calcext:value-type="float">
            <text:p>1.85E-04</text:p>
          </table:table-cell>
          <table:table-cell table:style-name="ce4" table:formula="of:=[Tabelle2.E16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731" calcext:value-type="float">
            <text:p>7.31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464" calcext:value-type="float">
            <text:p>4.64E-05</text:p>
          </table:table-cell>
          <table:table-cell table:style-name="ce4" table:formula="of:=[Tabelle2.E170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14" calcext:value-type="float">
            <text:p>6.14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759" calcext:value-type="float">
            <text:p>7.59E-04</text:p>
          </table:table-cell>
          <table:table-cell table:style-name="ce4" table:formula="of:=[Tabelle2.E17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14" calcext:value-type="float">
            <text:p>6.14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19" calcext:value-type="float">
            <text:p>1.90E-04</text:p>
          </table:table-cell>
          <table:table-cell table:style-name="ce4" table:formula="of:=[Tabelle2.E172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15" calcext:value-type="float">
            <text:p>6.15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474" calcext:value-type="float">
            <text:p>4.74E-05</text:p>
          </table:table-cell>
          <table:table-cell table:style-name="ce4" table:formula="of:=[Tabelle2.E173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0.541" calcext:value-type="float">
            <text:p>5.41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387" calcext:value-type="float">
            <text:p>3.87E-04</text:p>
          </table:table-cell>
          <table:table-cell table:style-name="ce4" table:formula="of:=[Tabelle2.E17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0.541" calcext:value-type="float">
            <text:p>5.41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968" calcext:value-type="float">
            <text:p>9.68E-05</text:p>
          </table:table-cell>
          <table:table-cell table:style-name="ce4" table:formula="of:=[Tabelle2.E175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0.541" calcext:value-type="float">
            <text:p>5.41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242" calcext:value-type="float">
            <text:p>2.42E-05</text:p>
          </table:table-cell>
          <table:table-cell table:style-name="ce4" table:formula="of:=[Tabelle2.E176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269" calcext:value-type="float">
            <text:p>2.69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386" calcext:value-type="float">
            <text:p>3.86E-04</text:p>
          </table:table-cell>
          <table:table-cell table:style-name="ce4" table:formula="of:=[Tabelle2.E17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269" calcext:value-type="float">
            <text:p>2.69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965" calcext:value-type="float">
            <text:p>9.65E-05</text:p>
          </table:table-cell>
          <table:table-cell table:style-name="ce4" table:formula="of:=[Tabelle2.E17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269" calcext:value-type="float">
            <text:p>2.69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241" calcext:value-type="float">
            <text:p>2.41E-05</text:p>
          </table:table-cell>
          <table:table-cell table:style-name="ce4" table:formula="of:=[Tabelle2.E17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603" calcext:value-type="float">
            <text:p>6.03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264" calcext:value-type="float">
            <text:p>2.64E-04</text:p>
          </table:table-cell>
          <table:table-cell table:style-name="ce4" table:formula="of:=[Tabelle2.E18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603" calcext:value-type="float">
            <text:p>6.03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659" calcext:value-type="float">
            <text:p>6.59E-05</text:p>
          </table:table-cell>
          <table:table-cell table:style-name="ce4" table:formula="of:=[Tabelle2.E18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603" calcext:value-type="float">
            <text:p>6.03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65" calcext:value-type="float">
            <text:p>1.65E-05</text:p>
          </table:table-cell>
          <table:table-cell table:style-name="ce4" table:formula="of:=[Tabelle2.E18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46" calcext:value-type="float">
            <text:p>5.46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208" calcext:value-type="float">
            <text:p>2.08E-04</text:p>
          </table:table-cell>
          <table:table-cell table:style-name="ce4" table:formula="of:=[Tabelle2.E18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46" calcext:value-type="float">
            <text:p>5.46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519" calcext:value-type="float">
            <text:p>5.19E-05</text:p>
          </table:table-cell>
          <table:table-cell table:style-name="ce4" table:formula="of:=[Tabelle2.E18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46" calcext:value-type="float">
            <text:p>5.46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3" calcext:value-type="float">
            <text:p>1.30E-05</text:p>
          </table:table-cell>
          <table:table-cell table:style-name="ce4" table:formula="of:=[Tabelle2.E18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602" calcext:value-type="float">
            <text:p>6.02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84" calcext:value-type="float">
            <text:p>1.84E-04</text:p>
          </table:table-cell>
          <table:table-cell table:style-name="ce4" table:formula="of:=[Tabelle2.E18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602" calcext:value-type="float">
            <text:p>6.02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461" calcext:value-type="float">
            <text:p>4.61E-05</text:p>
          </table:table-cell>
          <table:table-cell table:style-name="ce4" table:formula="of:=[Tabelle2.E187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602" calcext:value-type="float">
            <text:p>6.02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115" calcext:value-type="float">
            <text:p>1.15E-05</text:p>
          </table:table-cell>
          <table:table-cell table:style-name="ce4" table:formula="of:=[Tabelle2.E18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8" office:value-type="float" office:value="0.216" calcext:value-type="float">
            <text:p>2.16E-01</text:p>
          </table:table-cell>
          <table:table-cell table:style-name="ce8" office:value-type="float" office:value="0.0625" calcext:value-type="float">
            <text:p>6.25E-02</text:p>
          </table:table-cell>
          <table:table-cell table:style-name="ce8" office:value-type="float" office:value="0.000155" calcext:value-type="float">
            <text:p>1.55E-04</text:p>
          </table:table-cell>
          <table:table-cell table:style-name="ce4" table:formula="of:=[Tabelle2.E18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8" office:value-type="float" office:value="0.216" calcext:value-type="float">
            <text:p>2.16E-01</text:p>
          </table:table-cell>
          <table:table-cell table:style-name="ce8" office:value-type="float" office:value="0.0312" calcext:value-type="float">
            <text:p>3.12E-02</text:p>
          </table:table-cell>
          <table:table-cell table:style-name="ce8" office:value-type="float" office:value="0.0000388" calcext:value-type="float">
            <text:p>3.88E-05</text:p>
          </table:table-cell>
          <table:table-cell table:style-name="ce4" table:formula="of:=[Tabelle2.E190]" office:value-type="float" office:value="1.99" calcext:value-type="float">
            <text:p>1.99</text:p>
          </table:table-cell>
          <table:table-cell/>
        </table:table-row>
        <table:table-row table:style-name="ro1">
          <table:table-cell table:style-name="ce4" office:value-type="string" calcext:value-type="string">
            <text:p>Integraltest</text:p>
          </table:table-cell>
          <table:table-cell table:style-name="ce4" office:value-type="string" calcext:value-type="string">
            <text:p>S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8" office:value-type="float" office:value="0.216" calcext:value-type="float">
            <text:p>2.16E-01</text:p>
          </table:table-cell>
          <table:table-cell table:style-name="ce8" office:value-type="float" office:value="0.0156" calcext:value-type="float">
            <text:p>1.56E-02</text:p>
          </table:table-cell>
          <table:table-cell table:style-name="ce8" office:value-type="float" office:value="0.00000971" calcext:value-type="float">
            <text:p>9.71E-06</text:p>
          </table:table-cell>
          <table:table-cell table:style-name="ce4" table:formula="of:=[Tabelle2.E191]" office:value-type="float" office:value="2" calcext:value-type="float">
            <text:p>2</text:p>
          </table:table-cell>
          <table:table-cell/>
        </table:table-row>
      </table:table>
      <table:table table:name="Tabelle2" table:style-name="ta1"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683" calcext:value-type="float">
            <text:p>6.83E-14</text:p>
          </table:table-cell>
          <table:table-cell office:value-type="string" calcext:value-type="string">
            <text:p>&amp;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201" calcext:value-type="float">
            <text:p>2.01E-13</text:p>
          </table:table-cell>
          <table:table-cell office:value-type="string" calcext:value-type="string">
            <text:p>&amp;</text:p>
          </table:table-cell>
          <table:table-cell office:value-type="float" office:value="-2.47" calcext:value-type="float">
            <text:p>-2.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792" calcext:value-type="float">
            <text:p>7.92E-14</text:p>
          </table:table-cell>
          <table:table-cell office:value-type="string" calcext:value-type="string">
            <text:p>&amp;</text:p>
          </table:table-cell>
          <table:table-cell office:value-type="float" office:value="-2.09" calcext:value-type="float">
            <text:p>-2.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338" calcext:value-type="float">
            <text:p>3.38E-13</text:p>
          </table:table-cell>
          <table:table-cell office:value-type="string" calcext:value-type="string">
            <text:p>&amp;</text:p>
          </table:table-cell>
          <table:table-cell office:value-type="float" office:value="-2.05" calcext:value-type="float">
            <text:p>-2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72E-015" calcext:value-type="float">
            <text:p>1.72E-15</text:p>
          </table:table-cell>
          <table:table-cell office:value-type="string" calcext:value-type="string">
            <text:p>&amp;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4.5E-015" calcext:value-type="float">
            <text:p>4.50E-15</text:p>
          </table:table-cell>
          <table:table-cell office:value-type="string" calcext:value-type="string">
            <text:p>&amp;</text:p>
          </table:table-cell>
          <table:table-cell office:value-type="float" office:value="-2.01" calcext:value-type="float">
            <text:p>-2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724" calcext:value-type="float">
            <text:p>7.24E-14</text:p>
          </table:table-cell>
          <table:table-cell office:value-type="string" calcext:value-type="string">
            <text:p>&amp;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188" calcext:value-type="float">
            <text:p>1.88E-13</text:p>
          </table:table-cell>
          <table:table-cell office:value-type="string" calcext:value-type="string">
            <text:p>&amp;</text:p>
          </table:table-cell>
          <table:table-cell office:value-type="float" office:value="-2.66" calcext:value-type="float">
            <text:p>-2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999" calcext:value-type="float">
            <text:p>9.99E-14</text:p>
          </table:table-cell>
          <table:table-cell office:value-type="string" calcext:value-type="string">
            <text:p>&amp;</text:p>
          </table:table-cell>
          <table:table-cell office:value-type="float" office:value="-2.18" calcext:value-type="float">
            <text:p>-2.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455" calcext:value-type="float">
            <text:p>4.55E-13</text:p>
          </table:table-cell>
          <table:table-cell office:value-type="string" calcext:value-type="string">
            <text:p>&amp;</text:p>
          </table:table-cell>
          <table:table-cell office:value-type="float" office:value="-1.97" calcext:value-type="float">
            <text:p>-1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29E-015" calcext:value-type="float">
            <text:p>2.29E-15</text:p>
          </table:table-cell>
          <table:table-cell office:value-type="string" calcext:value-type="string">
            <text:p>&amp;</text:p>
          </table:table-cell>
          <table:table-cell office:value-type="float" office:value="-2.34" calcext:value-type="float">
            <text:p>-2.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116" calcext:value-type="float">
            <text:p>1.16E-14</text:p>
          </table:table-cell>
          <table:table-cell office:value-type="string" calcext:value-type="string">
            <text:p>&amp;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802" calcext:value-type="float">
            <text:p>8.02E-14</text:p>
          </table:table-cell>
          <table:table-cell office:value-type="string" calcext:value-type="string">
            <text:p>&amp;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173" calcext:value-type="float">
            <text:p>1.73E-13</text:p>
          </table:table-cell>
          <table:table-cell office:value-type="string" calcext:value-type="string">
            <text:p>&amp;</text:p>
          </table:table-cell>
          <table:table-cell office:value-type="float" office:value="-2.97" calcext:value-type="float">
            <text:p>-2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135" calcext:value-type="float">
            <text:p>1.35E-13</text:p>
          </table:table-cell>
          <table:table-cell office:value-type="string" calcext:value-type="string">
            <text:p>&amp;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655" calcext:value-type="float">
            <text:p>6.55E-13</text:p>
          </table:table-cell>
          <table:table-cell office:value-type="string" calcext:value-type="string">
            <text:p>&amp;</text:p>
          </table:table-cell>
          <table:table-cell office:value-type="float" office:value="-1.89" calcext:value-type="float">
            <text:p>-1.8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97E-015" calcext:value-type="float">
            <text:p>2.97E-15</text:p>
          </table:table-cell>
          <table:table-cell office:value-type="string" calcext:value-type="string">
            <text:p>&amp;</text:p>
          </table:table-cell>
          <table:table-cell office:value-type="float" office:value="-2.97" calcext:value-type="float">
            <text:p>-2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234" calcext:value-type="float">
            <text:p>2.34E-14</text:p>
          </table:table-cell>
          <table:table-cell office:value-type="string" calcext:value-type="string">
            <text:p>&amp;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285" calcext:value-type="float">
            <text:p>2.85E-14</text:p>
          </table:table-cell>
          <table:table-cell office:value-type="string" calcext:value-type="string">
            <text:p>&amp;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832" calcext:value-type="float">
            <text:p>8.32E-14</text:p>
          </table:table-cell>
          <table:table-cell office:value-type="string" calcext:value-type="string">
            <text:p>&amp;</text:p>
          </table:table-cell>
          <table:table-cell office:value-type="float" office:value="-2.46" calcext:value-type="float">
            <text:p>-2.4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344" calcext:value-type="float">
            <text:p>3.44E-14</text:p>
          </table:table-cell>
          <table:table-cell office:value-type="string" calcext:value-type="string">
            <text:p>&amp;</text:p>
          </table:table-cell>
          <table:table-cell office:value-type="float" office:value="-2.21" calcext:value-type="float">
            <text:p>-2.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16" calcext:value-type="float">
            <text:p>1.60E-13</text:p>
          </table:table-cell>
          <table:table-cell office:value-type="string" calcext:value-type="string">
            <text:p>&amp;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1.69E-015" calcext:value-type="float">
            <text:p>1.69E-15</text:p>
          </table:table-cell>
          <table:table-cell office:value-type="string" calcext:value-type="string">
            <text:p>&amp;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9.99E-016" calcext:value-type="float">
            <text:p>9.99E-16</text:p>
          </table:table-cell>
          <table:table-cell office:value-type="string" calcext:value-type="string">
            <text:p>&amp;</text:p>
          </table:table-cell>
          <table:table-cell office:value-type="float" office:value="-3.56" calcext:value-type="float">
            <text:p>-3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589" calcext:value-type="float">
            <text:p>5.89E-14</text:p>
          </table:table-cell>
          <table:table-cell office:value-type="string" calcext:value-type="string">
            <text:p>&amp;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16" calcext:value-type="float">
            <text:p>1.60E-13</text:p>
          </table:table-cell>
          <table:table-cell office:value-type="string" calcext:value-type="string">
            <text:p>&amp;</text:p>
          </table:table-cell>
          <table:table-cell office:value-type="float" office:value="-2.69" calcext:value-type="float">
            <text:p>-2.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358" calcext:value-type="float">
            <text:p>3.58E-14</text:p>
          </table:table-cell>
          <table:table-cell office:value-type="string" calcext:value-type="string">
            <text:p>&amp;</text:p>
          </table:table-cell>
          <table:table-cell office:value-type="float" office:value="-2.43" calcext:value-type="float">
            <text:p>-2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194" calcext:value-type="float">
            <text:p>1.94E-13</text:p>
          </table:table-cell>
          <table:table-cell office:value-type="string" calcext:value-type="string">
            <text:p>&amp;</text:p>
          </table:table-cell>
          <table:table-cell office:value-type="float" office:value="-1.68" calcext:value-type="float">
            <text:p>-1.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12E-016" calcext:value-type="float">
            <text:p>2.12E-16</text:p>
          </table:table-cell>
          <table:table-cell office:value-type="string" calcext:value-type="string">
            <text:p>&amp;</text:p>
          </table:table-cell>
          <table:table-cell office:value-type="float" office:value="-1.99" calcext:value-type="float">
            <text:p>-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8.47E-016" calcext:value-type="float">
            <text:p>8.47E-16</text:p>
          </table:table-cell>
          <table:table-cell office:value-type="string" calcext:value-type="string">
            <text:p>&amp;</text:p>
          </table:table-cell>
          <table:table-cell office:value-type="float" office:value="-6.41" calcext:value-type="float">
            <text:p>-6.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586" calcext:value-type="float">
            <text:p>5.86E-14</text:p>
          </table:table-cell>
          <table:table-cell office:value-type="string" calcext:value-type="string">
            <text:p>&amp;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132" calcext:value-type="float">
            <text:p>1.32E-13</text:p>
          </table:table-cell>
          <table:table-cell office:value-type="string" calcext:value-type="string">
            <text:p>&amp;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3" calcext:value-type="float">
            <text:p>1.3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26" calcext:value-type="float">
            <text:p>3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52" calcext:value-type="float">
            <text:p>2.5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3" calcext:value-type="float">
            <text:p>6.3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4" calcext:value-type="float">
            <text:p>3.34E-11</text:p>
          </table:table-cell>
          <table:table-cell office:value-type="string" calcext:value-type="string">
            <text:p>&amp;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26" calcext:value-type="float">
            <text:p>2.6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558" calcext:value-type="float">
            <text:p>5.58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62" calcext:value-type="float">
            <text:p>1.6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04" calcext:value-type="float">
            <text:p>4.04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19" calcext:value-type="float">
            <text:p>1.1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98" calcext:value-type="float">
            <text:p>2.9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23" calcext:value-type="float">
            <text:p>2.23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58" calcext:value-type="float">
            <text:p>5.58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05" calcext:value-type="float">
            <text:p>1.05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62" calcext:value-type="float">
            <text:p>2.62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733" calcext:value-type="float">
            <text:p>7.33E-14</text:p>
          </table:table-cell>
          <table:table-cell office:value-type="string" calcext:value-type="string">
            <text:p>&amp;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699" calcext:value-type="float">
            <text:p>6.99E-14</text:p>
          </table:table-cell>
          <table:table-cell office:value-type="string" calcext:value-type="string">
            <text:p>&amp;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697" calcext:value-type="float">
            <text:p>6.97E-14</text:p>
          </table:table-cell>
          <table:table-cell office:value-type="string" calcext:value-type="string">
            <text:p>&amp;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397" calcext:value-type="float">
            <text:p>3.97E-13</text:p>
          </table:table-cell>
          <table:table-cell office:value-type="string" calcext:value-type="string">
            <text:p>&amp;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13" calcext:value-type="float">
            <text:p>1.30E-14</text:p>
          </table:table-cell>
          <table:table-cell office:value-type="string" calcext:value-type="string">
            <text:p>&amp;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145" calcext:value-type="float">
            <text:p>1.45E-14</text:p>
          </table:table-cell>
          <table:table-cell office:value-type="string" calcext:value-type="string">
            <text:p>&amp;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2" calcext:value-type="float">
            <text:p>3.32E-11</text:p>
          </table:table-cell>
          <table:table-cell office:value-type="string" calcext:value-type="string">
            <text:p>&amp;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26" calcext:value-type="float">
            <text:p>2.6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558" calcext:value-type="float">
            <text:p>5.58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26" calcext:value-type="float">
            <text:p>2.6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26" calcext:value-type="float">
            <text:p>2.60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911" calcext:value-type="float">
            <text:p>9.11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228" calcext:value-type="float">
            <text:p>2.28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66" calcext:value-type="float">
            <text:p>3.66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17" calcext:value-type="float">
            <text:p>9.17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42" calcext:value-type="float">
            <text:p>7.4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85" calcext:value-type="float">
            <text:p>1.85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59" calcext:value-type="float">
            <text:p>7.5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9" calcext:value-type="float">
            <text:p>1.9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87" calcext:value-type="float">
            <text:p>3.8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68" calcext:value-type="float">
            <text:p>9.6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86" calcext:value-type="float">
            <text:p>3.8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65" calcext:value-type="float">
            <text:p>9.6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4.02E-016" calcext:value-type="float">
            <text:p>4.02E-16</text:p>
          </table:table-cell>
          <table:table-cell office:value-type="string" calcext:value-type="string">
            <text:p>&amp;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9.54E-016" calcext:value-type="float">
            <text:p>9.54E-16</text:p>
          </table:table-cell>
          <table:table-cell office:value-type="string" calcext:value-type="string">
            <text:p>&amp;</text:p>
          </table:table-cell>
          <table:table-cell office:value-type="float" office:value="-2.4" calcext:value-type="float">
            <text:p>-2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236" calcext:value-type="float">
            <text:p>2.36E-14</text:p>
          </table:table-cell>
          <table:table-cell office:value-type="string" calcext:value-type="string">
            <text:p>&amp;</text:p>
          </table:table-cell>
          <table:table-cell office:value-type="float" office:value="-1.97" calcext:value-type="float">
            <text:p>-1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926" calcext:value-type="float">
            <text:p>9.26E-14</text:p>
          </table:table-cell>
          <table:table-cell office:value-type="string" calcext:value-type="string">
            <text:p>&amp;</text:p>
          </table:table-cell>
          <table:table-cell office:value-type="float" office:value="-2.19" calcext:value-type="float">
            <text:p>-2.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3.21E-015" calcext:value-type="float">
            <text:p>3.21E-15</text:p>
          </table:table-cell>
          <table:table-cell office:value-type="string" calcext:value-type="string">
            <text:p>&amp;</text:p>
          </table:table-cell>
          <table:table-cell office:value-type="float" office:value="-4.1" calcext:value-type="float">
            <text:p>-4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553" calcext:value-type="float">
            <text:p>5.53E-14</text:p>
          </table:table-cell>
          <table:table-cell office:value-type="string" calcext:value-type="string">
            <text:p>&amp;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3.94E-016" calcext:value-type="float">
            <text:p>3.94E-16</text:p>
          </table:table-cell>
          <table:table-cell office:value-type="string" calcext:value-type="string">
            <text:p>&amp;</text:p>
          </table:table-cell>
          <table:table-cell office:value-type="float" office:value="-3.83" calcext:value-type="float">
            <text:p>-3.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5.62E-015" calcext:value-type="float">
            <text:p>5.62E-15</text:p>
          </table:table-cell>
          <table:table-cell office:value-type="string" calcext:value-type="string">
            <text:p>&amp;</text:p>
          </table:table-cell>
          <table:table-cell office:value-type="float" office:value="-2.42" calcext:value-type="float">
            <text:p>-2.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62" calcext:value-type="float">
            <text:p>1.6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04" calcext:value-type="float">
            <text:p>4.04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19" calcext:value-type="float">
            <text:p>1.1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98" calcext:value-type="float">
            <text:p>2.9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23" calcext:value-type="float">
            <text:p>2.23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58" calcext:value-type="float">
            <text:p>5.58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05" calcext:value-type="float">
            <text:p>1.05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62" calcext:value-type="float">
            <text:p>2.62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42" calcext:value-type="float">
            <text:p>7.4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85" calcext:value-type="float">
            <text:p>1.85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59" calcext:value-type="float">
            <text:p>7.5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9" calcext:value-type="float">
            <text:p>1.9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87" calcext:value-type="float">
            <text:p>3.8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68" calcext:value-type="float">
            <text:p>9.6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86" calcext:value-type="float">
            <text:p>3.8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65" calcext:value-type="float">
            <text:p>9.6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64" calcext:value-type="float">
            <text:p>2.64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659" calcext:value-type="float">
            <text:p>6.5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208" calcext:value-type="float">
            <text:p>2.0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519" calcext:value-type="float">
            <text:p>5.1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84" calcext:value-type="float">
            <text:p>1.84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61" calcext:value-type="float">
            <text:p>4.61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55" calcext:value-type="float">
            <text:p>1.55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88" calcext:value-type="float">
            <text:p>3.88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</table:table>
      <table:table table:name="Tabelle5" table:style-name="ta1">
        <table:table-column table:style-name="co1" table:number-columns-repeated="5" table:default-cell-style-name="ce4"/>
        <table:table-column table:style-name="co1" table:number-columns-repeated="3" table:default-cell-style-name="ce8"/>
        <table:table-column table:style-name="co1" table:default-cell-style-name="ce4"/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E+00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0.0000000000000104" calcext:value-type="float">
            <text:p>1.04E-1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E+00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0.000000000000038" calcext:value-type="float">
            <text:p>3.80E-1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E+00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0.000000000000144" calcext:value-type="float">
            <text:p>1.44E-1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.00E+00</text:p>
          </table:table-cell>
          <table:table-cell table:style-name="ce6" office:value-type="float" office:value="0.0625" calcext:value-type="float">
            <text:p>6.25E-02</text:p>
          </table:table-cell>
          <table:table-cell table:style-name="ce6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.00E+00</text:p>
          </table:table-cell>
          <table:table-cell table:style-name="ce6" office:value-type="float" office:value="0.0312" calcext:value-type="float">
            <text:p>3.12E-02</text:p>
          </table:table-cell>
          <table:table-cell table:style-name="ce6" office:value-type="float" office:value="2.22E-016" calcext:value-type="float">
            <text:p>2.22E-1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ntegraltest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.00E+00</text:p>
          </table:table-cell>
          <table:table-cell table:style-name="ce6" office:value-type="float" office:value="0.0156" calcext:value-type="float">
            <text:p>1.56E-02</text:p>
          </table:table-cell>
          <table:table-cell table:style-name="ce6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7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26" calcext:value-type="float">
            <text:p>1.26E-04</text:p>
          </table:table-cell>
          <table:table-cell table:formula="of:=[Tabelle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15" calcext:value-type="float">
            <text:p>3.15E-05</text:p>
          </table:table-cell>
          <table:table-cell table:formula="of:=[Tabelle6.E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787" calcext:value-type="float">
            <text:p>7.87E-06</text:p>
          </table:table-cell>
          <table:table-cell table:formula="of:=[Tabelle6.E11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1.17" calcext:value-type="float">
            <text:p>1.17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1.17" calcext:value-type="float">
            <text:p>1.17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1.17" calcext:value-type="float">
            <text:p>1.17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.0000000000334" calcext:value-type="float">
            <text:p>3.34E-11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1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" calcext:value-type="float">
            <text:p>1.40E-04</text:p>
          </table:table-cell>
          <table:table-cell table:formula="of:=[Tabelle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49" calcext:value-type="float">
            <text:p>3.49E-05</text:p>
          </table:table-cell>
          <table:table-cell table:formula="of:=[Tabelle6.E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73" calcext:value-type="float">
            <text:p>8.73E-06</text:p>
          </table:table-cell>
          <table:table-cell table:formula="of:=[Tabelle6.E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25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28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52" calcext:value-type="float">
            <text:p>1.52E-03</text:p>
          </table:table-cell>
          <table:table-cell table:formula="of:=[Tabelle6.E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38" calcext:value-type="float">
            <text:p>3.80E-04</text:p>
          </table:table-cell>
          <table:table-cell table:formula="of:=[Tabelle6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949" calcext:value-type="float">
            <text:p>9.49E-05</text:p>
          </table:table-cell>
          <table:table-cell table:formula="of:=[Tabelle6.E3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99" calcext:value-type="float">
            <text:p>7.99E-05</text:p>
          </table:table-cell>
          <table:table-cell table:formula="of:=[Tabelle6.E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" calcext:value-type="float">
            <text:p>2.00E-05</text:p>
          </table:table-cell>
          <table:table-cell table:formula="of:=[Tabelle6.E34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" calcext:value-type="float">
            <text:p>5.00E-06</text:p>
          </table:table-cell>
          <table:table-cell table:formula="of:=[Tabelle6.E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26" calcext:value-type="float">
            <text:p>1.26E-04</text:p>
          </table:table-cell>
          <table:table-cell table:formula="of:=[Tabelle6.E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15" calcext:value-type="float">
            <text:p>3.15E-05</text:p>
          </table:table-cell>
          <table:table-cell table:formula="of:=[Tabelle6.E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787" calcext:value-type="float">
            <text:p>7.87E-06</text:p>
          </table:table-cell>
          <table:table-cell table:formula="of:=[Tabelle6.E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" calcext:value-type="float">
            <text:p>1.40E-04</text:p>
          </table:table-cell>
          <table:table-cell table:formula="of:=[Tabelle6.E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49" calcext:value-type="float">
            <text:p>3.49E-05</text:p>
          </table:table-cell>
          <table:table-cell table:formula="of:=[Tabelle6.E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73" calcext:value-type="float">
            <text:p>8.73E-06</text:p>
          </table:table-cell>
          <table:table-cell table:formula="of:=[Tabelle6.E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99" calcext:value-type="float">
            <text:p>7.99E-05</text:p>
          </table:table-cell>
          <table:table-cell table:formula="of:=[Tabelle6.E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" calcext:value-type="float">
            <text:p>2.00E-05</text:p>
          </table:table-cell>
          <table:table-cell table:formula="of:=[Tabelle6.E43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" calcext:value-type="float">
            <text:p>5.00E-06</text:p>
          </table:table-cell>
          <table:table-cell table:formula="of:=[Tabelle6.E4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29" calcext:value-type="float">
            <text:p>1.29E-04</text:p>
          </table:table-cell>
          <table:table-cell table:formula="of:=[Tabelle6.E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23" calcext:value-type="float">
            <text:p>3.23E-05</text:p>
          </table:table-cell>
          <table:table-cell table:formula="of:=[Tabelle6.E46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07" calcext:value-type="float">
            <text:p>8.07E-06</text:p>
          </table:table-cell>
          <table:table-cell table:formula="of:=[Tabelle6.E47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2.22E-016" calcext:value-type="float">
            <text:p>2.22E-1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.17" calcext:value-type="float">
            <text:p>1.17E+00</text:p>
          </table:table-cell>
          <table:table-cell table:style-name="ce10" office:value-type="float" office:value="0.0625" calcext:value-type="float">
            <text:p>6.25E-02</text:p>
          </table:table-cell>
          <table:table-cell table:style-name="ce10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.17" calcext:value-type="float">
            <text:p>1.17E+00</text:p>
          </table:table-cell>
          <table:table-cell table:style-name="ce10" office:value-type="float" office:value="0.0312" calcext:value-type="float">
            <text:p>3.12E-02</text:p>
          </table:table-cell>
          <table:table-cell table:style-name="ce10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.17" calcext:value-type="float">
            <text:p>1.17E+00</text:p>
          </table:table-cell>
          <table:table-cell table:style-name="ce10" office:value-type="float" office:value="0.0156" calcext:value-type="float">
            <text:p>1.56E-02</text:p>
          </table:table-cell>
          <table:table-cell table:style-name="ce10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55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5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" calcext:value-type="float">
            <text:p>1.40E-04</text:p>
          </table:table-cell>
          <table:table-cell table:formula="of:=[Tabelle6.E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49" calcext:value-type="float">
            <text:p>3.49E-05</text:p>
          </table:table-cell>
          <table:table-cell table:formula="of:=[Tabelle6.E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73" calcext:value-type="float">
            <text:p>8.73E-06</text:p>
          </table:table-cell>
          <table:table-cell table:formula="of:=[Tabelle6.E59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.17" calcext:value-type="float">
            <text:p>1.17E+00</text:p>
          </table:table-cell>
          <table:table-cell table:style-name="ce7" office:value-type="float" office:value="0.0625" calcext:value-type="float">
            <text:p>6.25E-02</text:p>
          </table:table-cell>
          <table:table-cell table:style-name="ce7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.17" calcext:value-type="float">
            <text:p>1.17E+00</text:p>
          </table:table-cell>
          <table:table-cell table:style-name="ce7" office:value-type="float" office:value="0.0312" calcext:value-type="float">
            <text:p>3.12E-02</text:p>
          </table:table-cell>
          <table:table-cell table:style-name="ce7" office:value-type="float" office:value="0.0000000000333" calcext:value-type="float">
            <text:p>3.33E-1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ntegraltest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.17" calcext:value-type="float">
            <text:p>1.17E+00</text:p>
          </table:table-cell>
          <table:table-cell table:style-name="ce7" office:value-type="float" office:value="0.0156" calcext:value-type="float">
            <text:p>1.56E-02</text:p>
          </table:table-cell>
          <table:table-cell table:style-name="ce7" office:value-type="float" office:value="0.0000000000334" calcext:value-type="float">
            <text:p>3.34E-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M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.50E+00</text:p>
          </table:table-cell>
          <table:table-cell table:style-name="ce10" office:value-type="float" office:value="0.0625" calcext:value-type="float">
            <text:p>6.25E-02</text:p>
          </table:table-cell>
          <table:table-cell table:style-name="ce10" office:value-type="float" office:value="2.44E-015" calcext:value-type="float">
            <text:p>2.44E-15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M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.50E+00</text:p>
          </table:table-cell>
          <table:table-cell table:style-name="ce10" office:value-type="float" office:value="0.0312" calcext:value-type="float">
            <text:p>3.12E-02</text:p>
          </table:table-cell>
          <table:table-cell table:style-name="ce10" office:value-type="float" office:value="0" calcext:value-type="float">
            <text:p>0.00E+0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Integraltest</text:p>
          </table:table-cell>
          <table:table-cell table:style-name="ce5" office:value-type="string" calcext:value-type="string">
            <text:p>M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.50E+00</text:p>
          </table:table-cell>
          <table:table-cell table:style-name="ce10" office:value-type="float" office:value="0.0156" calcext:value-type="float">
            <text:p>1.56E-02</text:p>
          </table:table-cell>
          <table:table-cell table:style-name="ce10" office:value-type="float" office:value="4.44E-016" calcext:value-type="float">
            <text:p>4.44E-16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76" calcext:value-type="float">
            <text:p>7.60E-04</text:p>
          </table:table-cell>
          <table:table-cell table:formula="of:=[Tabelle6.E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9" calcext:value-type="float">
            <text:p>1.90E-04</text:p>
          </table:table-cell>
          <table:table-cell table:formula="of:=[Tabelle6.E6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75" calcext:value-type="float">
            <text:p>4.75E-05</text:p>
          </table:table-cell>
          <table:table-cell table:formula="of:=[Tabelle6.E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72" calcext:value-type="float">
            <text:p>1.72E-04</text:p>
          </table:table-cell>
          <table:table-cell table:formula="of:=[Tabelle6.E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429" calcext:value-type="float">
            <text:p>4.29E-05</text:p>
          </table:table-cell>
          <table:table-cell table:formula="of:=[Tabelle6.E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07" calcext:value-type="float">
            <text:p>1.07E-05</text:p>
          </table:table-cell>
          <table:table-cell table:formula="of:=[Tabelle6.E7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73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76" calcext:value-type="float">
            <text:p>7.60E-04</text:p>
          </table:table-cell>
          <table:table-cell table:formula="of:=[Tabelle6.E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9" calcext:value-type="float">
            <text:p>1.90E-04</text:p>
          </table:table-cell>
          <table:table-cell table:formula="of:=[Tabelle6.E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75" calcext:value-type="float">
            <text:p>4.75E-05</text:p>
          </table:table-cell>
          <table:table-cell table:formula="of:=[Tabelle6.E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95" calcext:value-type="float">
            <text:p>1.95E-03</text:p>
          </table:table-cell>
          <table:table-cell table:formula="of:=[Tabelle6.E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488" calcext:value-type="float">
            <text:p>4.88E-04</text:p>
          </table:table-cell>
          <table:table-cell table:formula="of:=[Tabelle6.E7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22" calcext:value-type="float">
            <text:p>1.22E-04</text:p>
          </table:table-cell>
          <table:table-cell table:formula="of:=[Tabelle6.E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13" calcext:value-type="float">
            <text:p>5.13E-05</text:p>
          </table:table-cell>
          <table:table-cell table:formula="of:=[Tabelle6.E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29" calcext:value-type="float">
            <text:p>1.29E-05</text:p>
          </table:table-cell>
          <table:table-cell table:formula="of:=[Tabelle6.E8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22" calcext:value-type="float">
            <text:p>3.22E-06</text:p>
          </table:table-cell>
          <table:table-cell table:formula="of:=[Tabelle6.E8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" calcext:value-type="float">
            <text:p>1.40E-04</text:p>
          </table:table-cell>
          <table:table-cell table:formula="of:=[Tabelle6.E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49" calcext:value-type="float">
            <text:p>3.49E-05</text:p>
          </table:table-cell>
          <table:table-cell table:formula="of:=[Tabelle6.E8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73" calcext:value-type="float">
            <text:p>8.73E-06</text:p>
          </table:table-cell>
          <table:table-cell table:formula="of:=[Tabelle6.E8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72" calcext:value-type="float">
            <text:p>1.72E-04</text:p>
          </table:table-cell>
          <table:table-cell table:formula="of:=[Tabelle6.E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429" calcext:value-type="float">
            <text:p>4.29E-05</text:p>
          </table:table-cell>
          <table:table-cell table:formula="of:=[Tabelle6.E8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07" calcext:value-type="float">
            <text:p>1.07E-05</text:p>
          </table:table-cell>
          <table:table-cell table:formula="of:=[Tabelle6.E8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13" calcext:value-type="float">
            <text:p>5.13E-05</text:p>
          </table:table-cell>
          <table:table-cell table:formula="of:=[Tabelle6.E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29" calcext:value-type="float">
            <text:p>1.29E-05</text:p>
          </table:table-cell>
          <table:table-cell table:formula="of:=[Tabelle6.E91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22" calcext:value-type="float">
            <text:p>3.22E-06</text:p>
          </table:table-cell>
          <table:table-cell table:formula="of:=[Tabelle6.E9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8" calcext:value-type="float">
            <text:p>1.48E-04</text:p>
          </table:table-cell>
          <table:table-cell table:formula="of:=[Tabelle6.E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7" calcext:value-type="float">
            <text:p>3.70E-05</text:p>
          </table:table-cell>
          <table:table-cell table:formula="of:=[Tabelle6.E9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924" calcext:value-type="float">
            <text:p>9.24E-06</text:p>
          </table:table-cell>
          <table:table-cell table:formula="of:=[Tabelle6.E9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97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9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100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10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52" calcext:value-type="float">
            <text:p>1.52E-03</text:p>
          </table:table-cell>
          <table:table-cell table:formula="of:=[Tabelle6.E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38" calcext:value-type="float">
            <text:p>3.80E-04</text:p>
          </table:table-cell>
          <table:table-cell table:formula="of:=[Tabelle6.E10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949" calcext:value-type="float">
            <text:p>9.49E-05</text:p>
          </table:table-cell>
          <table:table-cell table:formula="of:=[Tabelle6.E10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99" calcext:value-type="float">
            <text:p>7.99E-05</text:p>
          </table:table-cell>
          <table:table-cell table:formula="of:=[Tabelle6.E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" calcext:value-type="float">
            <text:p>2.00E-05</text:p>
          </table:table-cell>
          <table:table-cell table:formula="of:=[Tabelle6.E106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" calcext:value-type="float">
            <text:p>5.00E-06</text:p>
          </table:table-cell>
          <table:table-cell table:formula="of:=[Tabelle6.E10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651" calcext:value-type="float">
            <text:p>6.51E-04</text:p>
          </table:table-cell>
          <table:table-cell table:formula="of:=[Tabelle6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63" calcext:value-type="float">
            <text:p>1.63E-04</text:p>
          </table:table-cell>
          <table:table-cell table:formula="of:=[Tabelle6.E10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07" calcext:value-type="float">
            <text:p>4.07E-05</text:p>
          </table:table-cell>
          <table:table-cell table:formula="of:=[Tabelle6.E1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76" calcext:value-type="float">
            <text:p>7.60E-04</text:p>
          </table:table-cell>
          <table:table-cell table:formula="of:=[Tabelle6.E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19" calcext:value-type="float">
            <text:p>1.90E-04</text:p>
          </table:table-cell>
          <table:table-cell table:formula="of:=[Tabelle6.E1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475" calcext:value-type="float">
            <text:p>4.75E-05</text:p>
          </table:table-cell>
          <table:table-cell table:formula="of:=[Tabelle6.E1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95" calcext:value-type="float">
            <text:p>1.95E-03</text:p>
          </table:table-cell>
          <table:table-cell table:formula="of:=[Tabelle6.E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488" calcext:value-type="float">
            <text:p>4.88E-04</text:p>
          </table:table-cell>
          <table:table-cell table:formula="of:=[Tabelle6.E115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22" calcext:value-type="float">
            <text:p>1.22E-04</text:p>
          </table:table-cell>
          <table:table-cell table:formula="of:=[Tabelle6.E1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13" calcext:value-type="float">
            <text:p>5.13E-05</text:p>
          </table:table-cell>
          <table:table-cell table:formula="of:=[Tabelle6.E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29" calcext:value-type="float">
            <text:p>1.29E-05</text:p>
          </table:table-cell>
          <table:table-cell table:formula="of:=[Tabelle6.E118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22" calcext:value-type="float">
            <text:p>3.22E-06</text:p>
          </table:table-cell>
          <table:table-cell table:formula="of:=[Tabelle6.E1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52" calcext:value-type="float">
            <text:p>1.52E-03</text:p>
          </table:table-cell>
          <table:table-cell table:formula="of:=[Tabelle6.E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38" calcext:value-type="float">
            <text:p>3.80E-04</text:p>
          </table:table-cell>
          <table:table-cell table:formula="of:=[Tabelle6.E1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949" calcext:value-type="float">
            <text:p>9.49E-05</text:p>
          </table:table-cell>
          <table:table-cell table:formula="of:=[Tabelle6.E1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195" calcext:value-type="float">
            <text:p>1.95E-03</text:p>
          </table:table-cell>
          <table:table-cell table:formula="of:=[Tabelle6.E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488" calcext:value-type="float">
            <text:p>4.88E-04</text:p>
          </table:table-cell>
          <table:table-cell table:formula="of:=[Tabelle6.E124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122" calcext:value-type="float">
            <text:p>1.22E-04</text:p>
          </table:table-cell>
          <table:table-cell table:formula="of:=[Tabelle6.E1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.54" calcext:value-type="float">
            <text:p>4.54E+00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404" calcext:value-type="float">
            <text:p>4.04E-03</text:p>
          </table:table-cell>
          <table:table-cell table:formula="of:=[Tabelle6.E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.54" calcext:value-type="float">
            <text:p>4.54E+00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101" calcext:value-type="float">
            <text:p>1.01E-03</text:p>
          </table:table-cell>
          <table:table-cell table:formula="of:=[Tabelle6.E1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.54" calcext:value-type="float">
            <text:p>4.54E+00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252" calcext:value-type="float">
            <text:p>2.52E-04</text:p>
          </table:table-cell>
          <table:table-cell table:formula="of:=[Tabelle6.E1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83" calcext:value-type="float">
            <text:p>9.83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367" calcext:value-type="float">
            <text:p>3.67E-04</text:p>
          </table:table-cell>
          <table:table-cell table:formula="of:=[Tabelle6.E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82" calcext:value-type="float">
            <text:p>9.82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919" calcext:value-type="float">
            <text:p>9.19E-05</text:p>
          </table:table-cell>
          <table:table-cell table:formula="of:=[Tabelle6.E130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82" calcext:value-type="float">
            <text:p>9.82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23" calcext:value-type="float">
            <text:p>2.30E-05</text:p>
          </table:table-cell>
          <table:table-cell table:formula="of:=[Tabelle6.E1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99" calcext:value-type="float">
            <text:p>7.99E-05</text:p>
          </table:table-cell>
          <table:table-cell table:formula="of:=[Tabelle6.E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" calcext:value-type="float">
            <text:p>2.00E-05</text:p>
          </table:table-cell>
          <table:table-cell table:formula="of:=[Tabelle6.E133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" calcext:value-type="float">
            <text:p>5.00E-06</text:p>
          </table:table-cell>
          <table:table-cell table:formula="of:=[Tabelle6.E1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13" calcext:value-type="float">
            <text:p>5.13E-05</text:p>
          </table:table-cell>
          <table:table-cell table:formula="of:=[Tabelle6.E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29" calcext:value-type="float">
            <text:p>1.29E-05</text:p>
          </table:table-cell>
          <table:table-cell table:formula="of:=[Tabelle6.E136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22" calcext:value-type="float">
            <text:p>3.22E-06</text:p>
          </table:table-cell>
          <table:table-cell table:formula="of:=[Tabelle6.E1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83" calcext:value-type="float">
            <text:p>9.83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367" calcext:value-type="float">
            <text:p>3.67E-04</text:p>
          </table:table-cell>
          <table:table-cell table:formula="of:=[Tabelle6.E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82" calcext:value-type="float">
            <text:p>9.82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919" calcext:value-type="float">
            <text:p>9.19E-05</text:p>
          </table:table-cell>
          <table:table-cell table:formula="of:=[Tabelle6.E13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82" calcext:value-type="float">
            <text:p>9.82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23" calcext:value-type="float">
            <text:p>2.30E-05</text:p>
          </table:table-cell>
          <table:table-cell table:formula="of:=[Tabelle6.E1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47" calcext:value-type="float">
            <text:p>5.47E-05</text:p>
          </table:table-cell>
          <table:table-cell table:formula="of:=[Tabelle6.E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37" calcext:value-type="float">
            <text:p>1.37E-05</text:p>
          </table:table-cell>
          <table:table-cell table:formula="of:=[Tabelle6.E14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41" calcext:value-type="float">
            <text:p>3.41E-06</text:p>
          </table:table-cell>
          <table:table-cell table:formula="of:=[Tabelle6.E143]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26" calcext:value-type="float">
            <text:p>1.26E-04</text:p>
          </table:table-cell>
          <table:table-cell table:formula="of:=[Tabelle6.E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15" calcext:value-type="float">
            <text:p>3.15E-05</text:p>
          </table:table-cell>
          <table:table-cell table:formula="of:=[Tabelle6.E14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" calcext:value-type="float">
            <text:p>3.8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787" calcext:value-type="float">
            <text:p>7.87E-06</text:p>
          </table:table-cell>
          <table:table-cell table:formula="of:=[Tabelle6.E1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" calcext:value-type="float">
            <text:p>1.40E-04</text:p>
          </table:table-cell>
          <table:table-cell table:formula="of:=[Tabelle6.E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49" calcext:value-type="float">
            <text:p>3.49E-05</text:p>
          </table:table-cell>
          <table:table-cell table:formula="of:=[Tabelle6.E1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73" calcext:value-type="float">
            <text:p>8.73E-06</text:p>
          </table:table-cell>
          <table:table-cell table:formula="of:=[Tabelle6.E1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99" calcext:value-type="float">
            <text:p>7.99E-05</text:p>
          </table:table-cell>
          <table:table-cell table:formula="of:=[Tabelle6.E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" calcext:value-type="float">
            <text:p>2.00E-05</text:p>
          </table:table-cell>
          <table:table-cell table:formula="of:=[Tabelle6.E151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" calcext:value-type="float">
            <text:p>5.00E-06</text:p>
          </table:table-cell>
          <table:table-cell table:formula="of:=[Tabelle6.E1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29" calcext:value-type="float">
            <text:p>1.29E-04</text:p>
          </table:table-cell>
          <table:table-cell table:formula="of:=[Tabelle6.E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23" calcext:value-type="float">
            <text:p>3.23E-05</text:p>
          </table:table-cell>
          <table:table-cell table:formula="of:=[Tabelle6.E154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07" calcext:value-type="float">
            <text:p>8.07E-06</text:p>
          </table:table-cell>
          <table:table-cell table:formula="of:=[Tabelle6.E15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" calcext:value-type="float">
            <text:p>1.40E-04</text:p>
          </table:table-cell>
          <table:table-cell table:formula="of:=[Tabelle6.E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49" calcext:value-type="float">
            <text:p>3.49E-05</text:p>
          </table:table-cell>
          <table:table-cell table:formula="of:=[Tabelle6.E1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4.29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73" calcext:value-type="float">
            <text:p>8.73E-06</text:p>
          </table:table-cell>
          <table:table-cell table:formula="of:=[Tabelle6.E1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72" calcext:value-type="float">
            <text:p>1.72E-04</text:p>
          </table:table-cell>
          <table:table-cell table:formula="of:=[Tabelle6.E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429" calcext:value-type="float">
            <text:p>4.29E-05</text:p>
          </table:table-cell>
          <table:table-cell table:formula="of:=[Tabelle6.E16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107" calcext:value-type="float">
            <text:p>1.07E-05</text:p>
          </table:table-cell>
          <table:table-cell table:formula="of:=[Tabelle6.E16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13" calcext:value-type="float">
            <text:p>5.13E-05</text:p>
          </table:table-cell>
          <table:table-cell table:formula="of:=[Tabelle6.E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29" calcext:value-type="float">
            <text:p>1.29E-05</text:p>
          </table:table-cell>
          <table:table-cell table:formula="of:=[Tabelle6.E163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22" calcext:value-type="float">
            <text:p>3.22E-06</text:p>
          </table:table-cell>
          <table:table-cell table:formula="of:=[Tabelle6.E16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8" calcext:value-type="float">
            <text:p>1.48E-04</text:p>
          </table:table-cell>
          <table:table-cell table:formula="of:=[Tabelle6.E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7" calcext:value-type="float">
            <text:p>3.70E-05</text:p>
          </table:table-cell>
          <table:table-cell table:formula="of:=[Tabelle6.E16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924" calcext:value-type="float">
            <text:p>9.24E-06</text:p>
          </table:table-cell>
          <table:table-cell table:formula="of:=[Tabelle6.E16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799" calcext:value-type="float">
            <text:p>7.99E-05</text:p>
          </table:table-cell>
          <table:table-cell table:formula="of:=[Tabelle6.E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" calcext:value-type="float">
            <text:p>2.00E-05</text:p>
          </table:table-cell>
          <table:table-cell table:formula="of:=[Tabelle6.E169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5" calcext:value-type="float">
            <text:p>5.00E-06</text:p>
          </table:table-cell>
          <table:table-cell table:formula="of:=[Tabelle6.E1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13" calcext:value-type="float">
            <text:p>5.13E-05</text:p>
          </table:table-cell>
          <table:table-cell table:formula="of:=[Tabelle6.E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29" calcext:value-type="float">
            <text:p>1.29E-05</text:p>
          </table:table-cell>
          <table:table-cell table:formula="of:=[Tabelle6.E172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7.00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22" calcext:value-type="float">
            <text:p>3.22E-06</text:p>
          </table:table-cell>
          <table:table-cell table:formula="of:=[Tabelle6.E17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83" calcext:value-type="float">
            <text:p>9.83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367" calcext:value-type="float">
            <text:p>3.67E-04</text:p>
          </table:table-cell>
          <table:table-cell table:formula="of:=[Tabelle6.E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82" calcext:value-type="float">
            <text:p>9.82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919" calcext:value-type="float">
            <text:p>9.19E-05</text:p>
          </table:table-cell>
          <table:table-cell table:formula="of:=[Tabelle6.E175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82" calcext:value-type="float">
            <text:p>9.82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23" calcext:value-type="float">
            <text:p>2.30E-05</text:p>
          </table:table-cell>
          <table:table-cell table:formula="of:=[Tabelle6.E1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47" calcext:value-type="float">
            <text:p>5.47E-05</text:p>
          </table:table-cell>
          <table:table-cell table:formula="of:=[Tabelle6.E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37" calcext:value-type="float">
            <text:p>1.37E-05</text:p>
          </table:table-cell>
          <table:table-cell table:formula="of:=[Tabelle6.E178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41" calcext:value-type="float">
            <text:p>3.41E-06</text:p>
          </table:table-cell>
          <table:table-cell table:formula="of:=[Tabelle6.E179]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29" calcext:value-type="float">
            <text:p>1.29E-04</text:p>
          </table:table-cell>
          <table:table-cell table:formula="of:=[Tabelle6.E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23" calcext:value-type="float">
            <text:p>3.23E-05</text:p>
          </table:table-cell>
          <table:table-cell table:formula="of:=[Tabelle6.E181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1.98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807" calcext:value-type="float">
            <text:p>8.07E-06</text:p>
          </table:table-cell>
          <table:table-cell table:formula="of:=[Tabelle6.E1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48" calcext:value-type="float">
            <text:p>1.48E-04</text:p>
          </table:table-cell>
          <table:table-cell table:formula="of:=[Tabelle6.E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37" calcext:value-type="float">
            <text:p>3.70E-05</text:p>
          </table:table-cell>
          <table:table-cell table:formula="of:=[Tabelle6.E1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7" calcext:value-type="float">
            <text:p>2.27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924" calcext:value-type="float">
            <text:p>9.24E-06</text:p>
          </table:table-cell>
          <table:table-cell table:formula="of:=[Tabelle6.E18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0547" calcext:value-type="float">
            <text:p>5.47E-05</text:p>
          </table:table-cell>
          <table:table-cell table:formula="of:=[Tabelle6.E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137" calcext:value-type="float">
            <text:p>1.37E-05</text:p>
          </table:table-cell>
          <table:table-cell table:formula="of:=[Tabelle6.E187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2.82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341" calcext:value-type="float">
            <text:p>3.41E-06</text:p>
          </table:table-cell>
          <table:table-cell table:formula="of:=[Tabelle6.E188]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15" calcext:value-type="float">
            <text:p>1.15E-01</text:p>
          </table:table-cell>
          <table:table-cell office:value-type="float" office:value="0.0625" calcext:value-type="float">
            <text:p>6.25E-02</text:p>
          </table:table-cell>
          <table:table-cell office:value-type="float" office:value="0.000112" calcext:value-type="float">
            <text:p>1.12E-04</text:p>
          </table:table-cell>
          <table:table-cell table:formula="of:=[Tabelle6.E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15" calcext:value-type="float">
            <text:p>1.15E-01</text:p>
          </table:table-cell>
          <table:table-cell office:value-type="float" office:value="0.0312" calcext:value-type="float">
            <text:p>3.12E-02</text:p>
          </table:table-cell>
          <table:table-cell office:value-type="float" office:value="0.0000281" calcext:value-type="float">
            <text:p>2.81E-05</text:p>
          </table:table-cell>
          <table:table-cell table:formula="of:=[Tabelle6.E190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Integraltes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15" calcext:value-type="float">
            <text:p>1.15E-01</text:p>
          </table:table-cell>
          <table:table-cell office:value-type="float" office:value="0.0156" calcext:value-type="float">
            <text:p>1.56E-02</text:p>
          </table:table-cell>
          <table:table-cell office:value-type="float" office:value="0.00000702" calcext:value-type="float">
            <text:p>7.02E-06</text:p>
          </table:table-cell>
          <table:table-cell table:formula="of:=[Tabelle6.E191]" office:value-type="float" office:value="2" calcext:value-type="float">
            <text:p>2</text:p>
          </table:table-cell>
        </table:table-row>
      </table:table>
      <table:table table:name="Tabelle6" table:style-name="ta1"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000104" calcext:value-type="float">
            <text:p>1.04E-14</text:p>
          </table:table-cell>
          <table:table-cell office:value-type="string" calcext:value-type="string">
            <text:p>&amp;</text:p>
          </table:table-cell>
          <table:table-cell office:value-type="float" office:value="-1.87" calcext:value-type="float">
            <text:p>-1.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00038" calcext:value-type="float">
            <text:p>3.80E-14</text:p>
          </table:table-cell>
          <table:table-cell office:value-type="string" calcext:value-type="string">
            <text:p>&amp;</text:p>
          </table:table-cell>
          <table:table-cell office:value-type="float" office:value="-1.92" calcext:value-type="float">
            <text:p>-1.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22E-016" calcext:value-type="float">
            <text:p>2.22E-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26" calcext:value-type="float">
            <text:p>1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15" calcext:value-type="float">
            <text:p>3.1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52" calcext:value-type="float">
            <text:p>1.52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8" calcext:value-type="float">
            <text:p>3.8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99" calcext:value-type="float">
            <text:p>7.99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" calcext:value-type="float">
            <text:p>2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26" calcext:value-type="float">
            <text:p>1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15" calcext:value-type="float">
            <text:p>3.1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99" calcext:value-type="float">
            <text:p>7.99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" calcext:value-type="float">
            <text:p>2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29" calcext:value-type="float">
            <text:p>1.2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23" calcext:value-type="float">
            <text:p>3.23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2.22E-016" calcext:value-type="float">
            <text:p>2.22E-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000000333" calcext:value-type="float">
            <text:p>3.33E-11</text:p>
          </table:table-cell>
          <table:table-cell office:value-type="string" calcext:value-type="string">
            <text:p>&amp;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2.44E-015" calcext:value-type="float">
            <text:p>2.44E-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6" calcext:value-type="float">
            <text:p>7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9" calcext:value-type="float">
            <text:p>1.9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72" calcext:value-type="float">
            <text:p>1.7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29" calcext:value-type="float">
            <text:p>4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6" calcext:value-type="float">
            <text:p>7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9" calcext:value-type="float">
            <text:p>1.9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95" calcext:value-type="float">
            <text:p>1.95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488" calcext:value-type="float">
            <text:p>4.8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13" calcext:value-type="float">
            <text:p>5.13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72" calcext:value-type="float">
            <text:p>1.7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29" calcext:value-type="float">
            <text:p>4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13" calcext:value-type="float">
            <text:p>5.13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8" calcext:value-type="float">
            <text:p>1.4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7" calcext:value-type="float">
            <text:p>3.7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52" calcext:value-type="float">
            <text:p>1.52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8" calcext:value-type="float">
            <text:p>3.8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99" calcext:value-type="float">
            <text:p>7.99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" calcext:value-type="float">
            <text:p>2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651" calcext:value-type="float">
            <text:p>6.51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63" calcext:value-type="float">
            <text:p>1.63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76" calcext:value-type="float">
            <text:p>7.6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19" calcext:value-type="float">
            <text:p>1.9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95" calcext:value-type="float">
            <text:p>1.95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488" calcext:value-type="float">
            <text:p>4.8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13" calcext:value-type="float">
            <text:p>5.13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52" calcext:value-type="float">
            <text:p>1.52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38" calcext:value-type="float">
            <text:p>3.8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195" calcext:value-type="float">
            <text:p>1.95E-03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488" calcext:value-type="float">
            <text:p>4.8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404" calcext:value-type="float">
            <text:p>4.04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101" calcext:value-type="float">
            <text:p>1.01E-0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67" calcext:value-type="float">
            <text:p>3.6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19" calcext:value-type="float">
            <text:p>9.1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99" calcext:value-type="float">
            <text:p>7.99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" calcext:value-type="float">
            <text:p>2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13" calcext:value-type="float">
            <text:p>5.13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67" calcext:value-type="float">
            <text:p>3.6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19" calcext:value-type="float">
            <text:p>9.1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47" calcext:value-type="float">
            <text:p>5.47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37" calcext:value-type="float">
            <text:p>1.37E-05</text:p>
          </table:table-cell>
          <table:table-cell office:value-type="string" calcext:value-type="string">
            <text:p>&amp;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26" calcext:value-type="float">
            <text:p>1.26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15" calcext:value-type="float">
            <text:p>3.15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99" calcext:value-type="float">
            <text:p>7.99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" calcext:value-type="float">
            <text:p>2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29" calcext:value-type="float">
            <text:p>1.2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23" calcext:value-type="float">
            <text:p>3.23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" calcext:value-type="float">
            <text:p>1.40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72" calcext:value-type="float">
            <text:p>1.72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429" calcext:value-type="float">
            <text:p>4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13" calcext:value-type="float">
            <text:p>5.13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8" calcext:value-type="float">
            <text:p>1.4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7" calcext:value-type="float">
            <text:p>3.7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799" calcext:value-type="float">
            <text:p>7.99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" calcext:value-type="float">
            <text:p>2.0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13" calcext:value-type="float">
            <text:p>5.13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367" calcext:value-type="float">
            <text:p>3.67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919" calcext:value-type="float">
            <text:p>9.19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47" calcext:value-type="float">
            <text:p>5.47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37" calcext:value-type="float">
            <text:p>1.37E-05</text:p>
          </table:table-cell>
          <table:table-cell office:value-type="string" calcext:value-type="string">
            <text:p>&amp;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29" calcext:value-type="float">
            <text:p>1.29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23" calcext:value-type="float">
            <text:p>3.23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48" calcext:value-type="float">
            <text:p>1.48E-0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37" calcext:value-type="float">
            <text:p>3.70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0547" calcext:value-type="float">
            <text:p>5.47E-05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137" calcext:value-type="float">
            <text:p>1.37E-05</text:p>
          </table:table-cell>
          <table:table-cell office:value-type="string" calcext:value-type="string">
            <text:p>&amp;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0625" calcext:value-type="float">
            <text:p>6.25E-02</text:p>
          </table:table-cell>
          <table:table-cell office:value-type="string" calcext:value-type="string">
            <text:p>&amp;</text:p>
          </table:table-cell>
          <table:table-cell office:value-type="float" office:value="0.000112" calcext:value-type="float">
            <text:p>1.12E-04</text:p>
          </table:table-cell>
          <table:table-cell office:value-type="string" calcext:value-type="string">
            <text:p>&amp;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312" calcext:value-type="float">
            <text:p>3.12E-02</text:p>
          </table:table-cell>
          <table:table-cell office:value-type="string" calcext:value-type="string">
            <text:p>&amp;</text:p>
          </table:table-cell>
          <table:table-cell office:value-type="float" office:value="0.0000281" calcext:value-type="float">
            <text:p>2.81E-0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Tabelle3.A1:Tabelle3.H192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Tabelle1.A1:Tabelle1.H192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4" table:target-range-address="Tabelle5.A1:Tabelle5.H192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.00.0000</text:date>, <text:time style:data-style-name="N2" text:time-value="23:11:42.3522709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9:16:08.716081486</meta:creation-date>
    <dc:date>2018-08-24T23:23:01.971677101</dc:date>
    <meta:editing-duration>PT1H16M48S</meta:editing-duration>
    <meta:editing-cycles>34</meta:editing-cycles>
    <meta:generator>LibreOffice/5.1.6.2$Linux_X86_64 LibreOffice_project/10m0$Build-2</meta:generator>
    <meta:document-statistic meta:table-count="6" meta:cell-count="7291" meta:object-count="0"/>
  </office:meta>
</office:document-meta>
</file>